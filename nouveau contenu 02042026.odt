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Agency FB" svg:font-family="Agency FB" style:font-family-generic="swiss" style:font-pitch="variable" svg:panose-1="2 11 5 3 2 2 2 2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7" style:parent-style-name="Normal" style:family="paragraph">
      <style:paragraph-properties fo:text-align="justify"/>
      <style:text-properties fo:font-weight="bold" style:font-weight-asian="bold" style:font-weight-complex="bold"/>
    </style:style>
    <style:style style:name="P8" style:parent-style-name="Normal" style:family="paragraph">
      <style:paragraph-properties fo:text-align="justify"/>
    </style:style>
    <style:style style:name="T9" style:parent-style-name="Policepardéfaut" style:family="text">
      <style:text-properties fo:font-style="italic" style:font-style-asian="italic" style:font-style-complex="italic"/>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T12" style:parent-style-name="Policepardéfaut" style:family="text">
      <style:text-properties fo:font-weight="bold" style:font-weight-asian="bold" style:font-weight-complex="bold"/>
    </style:style>
    <style:style style:name="P13" style:parent-style-name="Normal" style:family="paragraph">
      <style:paragraph-properties fo:text-align="justify"/>
      <style:text-properties fo:font-weight="bold" style:font-weight-asian="bold" style:font-weight-complex="bold"/>
    </style:style>
    <style:style style:name="P14" style:parent-style-name="Normal" style:family="paragraph">
      <style:paragraph-properties fo:text-align="justify"/>
    </style:style>
    <style:style style:name="P15" style:parent-style-name="Normal" style:list-style-name="LFO1" style:family="paragraph">
      <style:paragraph-properties fo:text-align="justify"/>
    </style:style>
    <style:style style:name="P16" style:parent-style-name="Normal" style:list-style-name="LFO1" style:family="paragraph">
      <style:paragraph-properties fo:text-align="justify"/>
    </style:style>
    <style:style style:name="P17" style:parent-style-name="Normal" style:list-style-name="LFO1" style:family="paragraph">
      <style:paragraph-properties fo:text-align="justify"/>
    </style:style>
    <style:style style:name="P18" style:parent-style-name="Normal" style:family="paragraph">
      <style:paragraph-properties fo:text-align="justify"/>
    </style:style>
    <style:style style:name="P19" style:parent-style-name="Normal" style:family="paragraph">
      <style:paragraph-properties fo:text-align="justify"/>
    </style:style>
    <style:style style:name="T20" style:parent-style-name="Policepardéfaut" style:family="text">
      <style:text-properties fo:font-weight="bold" style:font-weight-asian="bold" style:font-weight-complex="bold"/>
    </style:style>
    <style:style style:name="P21" style:parent-style-name="Normal" style:family="paragraph">
      <style:paragraph-properties fo:text-align="justify"/>
      <style:text-properties fo:font-weight="bold" style:font-weight-asian="bold" style:font-weight-complex="bold"/>
    </style:style>
    <style:style style:name="P22" style:parent-style-name="Normal" style:family="paragraph">
      <style:paragraph-properties fo:text-align="justify"/>
    </style:style>
    <style:style style:name="T23" style:parent-style-name="Policepardéfaut" style:family="text">
      <style:text-properties fo:font-weight="bold" style:font-weight-asian="bold" style:font-weight-complex="bold"/>
    </style:style>
    <style:style style:name="P24" style:parent-style-name="Normal" style:family="paragraph">
      <style:paragraph-properties fo:text-align="justify"/>
      <style:text-properties fo:font-weight="bold" style:font-weight-asian="bold" style:font-weight-complex="bold"/>
    </style:style>
    <style:style style:name="P25" style:parent-style-name="Normal" style:family="paragraph">
      <style:paragraph-properties fo:text-align="justify"/>
    </style:style>
    <style:style style:name="T26" style:parent-style-name="Policepardéfaut" style:family="text">
      <style:text-properties fo:font-style="italic" style:font-style-asian="italic" style:font-style-complex="italic"/>
    </style:style>
    <style:style style:name="P27" style:parent-style-name="Normal" style:family="paragraph">
      <style:paragraph-properties fo:text-align="justify"/>
    </style:style>
    <style:style style:name="P28" style:parent-style-name="Normal" style:family="paragraph">
      <style:paragraph-properties fo:text-align="justify"/>
    </style:style>
    <style:style style:name="T29" style:parent-style-name="Policepardéfaut" style:family="text">
      <style:text-properties style:font-name="Segoe UI Emoji" style:font-name-complex="Segoe UI Emoji"/>
    </style:style>
    <style:style style:name="P30" style:parent-style-name="Normal" style:family="paragraph">
      <style:paragraph-properties fo:text-align="justify"/>
    </style:style>
    <style:style style:name="T31" style:parent-style-name="Policepardéfaut" style:family="text">
      <style:text-properties fo:font-weight="bold" style:font-weight-asian="bold" style:font-weight-complex="bold"/>
    </style:style>
    <style:style style:name="P32" style:parent-style-name="Normal" style:family="paragraph">
      <style:paragraph-properties fo:text-align="justify"/>
      <style:text-properties fo:font-weight="bold" style:font-weight-asian="bold" style:font-weight-complex="bold"/>
    </style:style>
    <style:style style:name="P33" style:parent-style-name="Normal" style:family="paragraph">
      <style:paragraph-properties fo:text-align="justify"/>
    </style:style>
    <style:style style:name="T34" style:parent-style-name="Policepardéfaut" style:family="text">
      <style:text-properties fo:font-style="italic" style:font-style-asian="italic" style:font-style-complex="italic"/>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T37" style:parent-style-name="Policepardéfaut" style:family="text">
      <style:text-properties style:font-name="Segoe UI Emoji" style:font-name-complex="Segoe UI Emoji"/>
    </style:style>
    <style:style style:name="P38" style:parent-style-name="Normal" style:family="paragraph">
      <style:paragraph-properties fo:text-align="justify"/>
    </style:style>
    <style:style style:name="P39" style:parent-style-name="Normal" style:family="paragraph">
      <style:paragraph-properties fo:text-align="justify"/>
      <style:text-properties fo:font-weight="bold" style:font-weight-asian="bold" style:font-weight-complex="bold"/>
    </style:style>
    <style:style style:name="P40" style:parent-style-name="Normal" style:family="paragraph">
      <style:paragraph-properties fo:text-align="justify"/>
    </style:style>
    <style:style style:name="T41" style:parent-style-name="Policepardéfaut" style:family="text">
      <style:text-properties fo:font-style="italic" style:font-style-asian="italic" style:font-style-complex="italic"/>
    </style:style>
    <style:style style:name="P42" style:parent-style-name="Normal" style:family="paragraph">
      <style:paragraph-properties fo:text-align="justify"/>
    </style:style>
    <style:style style:name="P43" style:parent-style-name="Normal" style:family="paragraph">
      <style:paragraph-properties fo:text-align="justify"/>
    </style:style>
    <style:style style:name="T44" style:parent-style-name="Policepardéfaut" style:family="text">
      <style:text-properties style:font-name="Segoe UI Emoji" style:font-name-complex="Segoe UI Emoji"/>
    </style:style>
    <style:style style:name="P45" style:parent-style-name="Normal" style:family="paragraph">
      <style:paragraph-properties fo:text-align="justify"/>
    </style:style>
    <style:style style:name="P46" style:parent-style-name="Normal" style:family="paragraph">
      <style:paragraph-properties fo:text-align="justify"/>
    </style:style>
    <style:style style:name="P47" style:parent-style-name="Normal" style:family="paragraph">
      <style:paragraph-properties fo:text-align="justify"/>
      <style:text-properties fo:font-weight="bold" style:font-weight-asian="bold" style:font-weight-complex="bold"/>
    </style:style>
    <style:style style:name="P48" style:parent-style-name="Normal" style:family="paragraph">
      <style:paragraph-properties fo:text-align="justify"/>
    </style:style>
    <style:style style:name="P49" style:parent-style-name="Normal" style:list-style-name="LFO2" style:family="paragraph">
      <style:paragraph-properties fo:text-align="justify"/>
    </style:style>
    <style:style style:name="P50" style:parent-style-name="Normal" style:list-style-name="LFO2" style:family="paragraph">
      <style:paragraph-properties fo:text-align="justify"/>
    </style:style>
    <style:style style:name="P51" style:parent-style-name="Normal" style:list-style-name="LFO2" style:family="paragraph">
      <style:paragraph-properties fo:text-align="justify"/>
    </style:style>
    <style:style style:name="P52" style:parent-style-name="Normal" style:family="paragraph">
      <style:paragraph-properties fo:text-align="justify"/>
    </style:style>
    <style:style style:name="P53" style:parent-style-name="Normal" style:family="paragraph">
      <style:paragraph-properties fo:text-align="justify"/>
      <style:text-properties fo:font-weight="bold" style:font-weight-asian="bold" style:font-weight-complex="bold"/>
    </style:style>
    <style:style style:name="P54" style:parent-style-name="Normal" style:family="paragraph">
      <style:paragraph-properties fo:text-align="justify"/>
    </style:style>
    <style:style style:name="T55" style:parent-style-name="Policepardéfaut" style:family="text">
      <style:text-properties fo:font-style="italic" style:font-style-asian="italic" style:font-style-complex="italic"/>
    </style:style>
    <style:style style:name="P56" style:parent-style-name="Normal" style:family="paragraph">
      <style:paragraph-properties fo:text-align="justify"/>
    </style:style>
    <style:style style:name="P57" style:parent-style-name="Normal"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58" style:parent-style-name="Normal" style:family="paragraph">
      <style:paragraph-properties fo:text-align="justify"/>
      <style:text-properties fo:font-weight="bold" style:font-weight-asian="bold" style:font-weight-complex="bold"/>
    </style:style>
    <style:style style:name="P59" style:parent-style-name="Normal" style:family="paragraph">
      <style:paragraph-properties fo:text-align="justify"/>
    </style:style>
    <style:style style:name="T60" style:parent-style-name="Policepardéfaut" style:family="text">
      <style:text-properties fo:font-style="italic" style:font-style-asian="italic" style:font-style-complex="italic"/>
    </style:style>
    <style:style style:name="P61" style:parent-style-name="Normal" style:family="paragraph">
      <style:paragraph-properties fo:text-align="justify"/>
    </style:style>
    <style:style style:name="P62" style:parent-style-name="Normal" style:family="paragraph">
      <style:paragraph-properties fo:text-align="justify"/>
      <style:text-properties fo:font-weight="bold" style:font-weight-asian="bold" style:font-weight-complex="bold"/>
    </style:style>
    <style:style style:name="P63" style:parent-style-name="Normal" style:family="paragraph">
      <style:paragraph-properties fo:text-align="justify"/>
    </style:style>
    <style:style style:name="P64" style:parent-style-name="Normal" style:family="paragraph">
      <style:paragraph-properties fo:text-align="justify"/>
    </style:style>
    <style:style style:name="P65" style:parent-style-name="Normal" style:family="paragraph">
      <style:paragraph-properties fo:text-align="justify"/>
    </style:style>
    <style:style style:name="P66" style:parent-style-name="Normal" style:family="paragraph">
      <style:paragraph-properties fo:text-align="justify"/>
      <style:text-properties fo:font-weight="bold" style:font-weight-asian="bold" style:font-weight-complex="bold"/>
    </style:style>
    <style:style style:name="P67" style:parent-style-name="Normal" style:family="paragraph">
      <style:paragraph-properties fo:text-align="justify"/>
    </style:style>
    <style:style style:name="P68" style:parent-style-name="Normal" style:list-style-name="LFO3" style:family="paragraph">
      <style:paragraph-properties fo:text-align="justify"/>
    </style:style>
    <style:style style:name="P69" style:parent-style-name="Normal" style:list-style-name="LFO3" style:family="paragraph">
      <style:paragraph-properties fo:text-align="justify"/>
    </style:style>
    <style:style style:name="P70" style:parent-style-name="Normal" style:list-style-name="LFO3" style:family="paragraph">
      <style:paragraph-properties fo:text-align="justify"/>
    </style:style>
    <style:style style:name="P71" style:parent-style-name="Normal" style:list-style-name="LFO3" style:family="paragraph">
      <style:paragraph-properties fo:text-align="justify"/>
    </style:style>
    <style:style style:name="P72" style:parent-style-name="Normal" style:family="paragraph">
      <style:paragraph-properties fo:text-align="justify" fo:margin-bottom="0in"/>
      <style:text-properties fo:background-color="#FFFF00"/>
    </style:style>
    <style:style style:name="P73" style:parent-style-name="Normal" style:family="paragraph">
      <style:paragraph-properties fo:text-align="justify" fo:margin-bottom="0.0833in"/>
    </style:style>
    <style:style style:name="T74" style:parent-style-name="Policepardéfaut" style:family="text">
      <style:text-properties fo:font-weight="bold" style:font-weight-asian="bold" style:font-weight-complex="bold" fo:background-color="#FFFF00"/>
    </style:style>
    <style:style style:name="P75" style:parent-style-name="Normal" style:family="paragraph">
      <style:paragraph-properties fo:text-align="justify"/>
    </style:style>
    <style:style style:name="P76" style:parent-style-name="Normal" style:family="paragraph">
      <style:paragraph-properties fo:text-align="justify"/>
    </style:style>
    <style:style style:name="P77" style:parent-style-name="Normal" style:family="paragraph">
      <style:paragraph-properties fo:margin-top="0.0694in" fo:margin-bottom="0.0694in" fo:line-height="100%"/>
      <style:text-properties fo:font-weight="bold" style:font-weight-asian="bold" style:font-weight-complex="bold"/>
    </style:style>
    <style:style style:name="P78" style:parent-style-name="Normal" style:family="paragraph">
      <style:paragraph-properties fo:margin-top="0.0694in" fo:margin-bottom="0.0694in" fo:line-height="100%"/>
      <style:text-properties style:font-name="Times New Roman" style:font-name-asian="Times New Roman" style:letter-kerning="false" fo:background-color="#FFFF00" style:language-asian="fr" style:country-asian="FR"/>
    </style:style>
    <style:style style:name="P79" style:parent-style-name="Paragraphedeliste" style:family="paragraph">
      <style:paragraph-properties fo:margin-top="0.0694in" fo:margin-bottom="0.0694in" fo:line-height="100%"/>
      <style:text-properties style:font-name="Times New Roman" style:font-name-asian="Times New Roman" style:letter-kerning="false" fo:background-color="#FFFF00" style:language-asian="fr" style:country-asian="FR"/>
    </style:style>
    <style:style style:name="P80" style:parent-style-name="Normal" style:family="paragraph">
      <style:paragraph-properties fo:margin-top="0.0694in" fo:margin-bottom="0.0694in" fo:line-height="100%" fo:margin-left="0.25in">
        <style:tab-stops/>
      </style:paragraph-properties>
    </style:style>
    <style:style style:name="T81" style:parent-style-name="Policepardéfaut" style:family="text">
      <style:text-properties style:font-name="Times New Roman" style:font-name-asian="Times New Roman" style:letter-kerning="false" fo:background-color="#FFFF00" style:language-asian="fr" style:country-asian="FR"/>
    </style:style>
    <style:style style:name="P82" style:parent-style-name="Normal" style:family="paragraph">
      <style:paragraph-properties fo:text-align="justify" fo:margin-left="0.5in">
        <style:tab-stops/>
      </style:paragraph-properties>
    </style:style>
    <style:style style:name="P83" style:parent-style-name="Normal" style:family="paragraph">
      <style:paragraph-properties fo:text-align="justify"/>
    </style:style>
    <style:style style:name="P84" style:parent-style-name="Normal" style:family="paragraph">
      <style:paragraph-properties fo:text-align="justify"/>
      <style:text-properties fo:font-weight="bold" style:font-weight-asian="bold" style:font-weight-complex="bold"/>
    </style:style>
    <style:style style:name="P85" style:parent-style-name="Normal" style:list-style-name="LFO4" style:family="paragraph">
      <style:paragraph-properties fo:text-align="justify"/>
    </style:style>
    <style:style style:name="P86" style:parent-style-name="Normal" style:list-style-name="LFO4" style:family="paragraph">
      <style:paragraph-properties fo:text-align="justify"/>
    </style:style>
    <style:style style:name="P87" style:parent-style-name="Normal" style:list-style-name="LFO4" style:family="paragraph">
      <style:paragraph-properties fo:text-align="justify"/>
    </style:style>
    <style:style style:name="P88" style:parent-style-name="Normal" style:family="paragraph">
      <style:paragraph-properties fo:text-align="justify"/>
    </style:style>
    <style:style style:name="P89" style:parent-style-name="Normal" style:family="paragraph">
      <style:paragraph-properties fo:text-align="justify"/>
      <style:text-properties fo:font-weight="bold" style:font-weight-asian="bold" style:font-weight-complex="bold"/>
    </style:style>
    <style:style style:name="P90" style:parent-style-name="Normal" style:family="paragraph">
      <style:paragraph-properties fo:text-align="justify"/>
    </style:style>
    <style:style style:name="T91" style:parent-style-name="Policepardéfaut" style:family="text">
      <style:text-properties style:font-name="Segoe UI Emoji" style:font-name-complex="Segoe UI Emoji"/>
    </style:style>
    <style:style style:name="T92" style:parent-style-name="Policepardéfaut" style:family="text">
      <style:text-properties fo:font-style="italic" style:font-style-asian="italic" style:font-style-complex="italic"/>
    </style:style>
    <style:style style:name="P93" style:parent-style-name="Normal" style:family="paragraph">
      <style:paragraph-properties fo:text-align="justify"/>
    </style:style>
    <style:style style:name="T94" style:parent-style-name="Policepardéfaut" style:family="text">
      <style:text-properties style:font-name="Segoe UI Emoji" style:font-name-complex="Segoe UI Emoji" fo:font-weight="bold" style:font-weight-asian="bold" style:font-weight-complex="bold" fo:color="#E97132"/>
    </style:style>
    <style:style style:name="T95" style:parent-style-name="Policepardéfaut" style:family="text">
      <style:text-properties style:font-name="Agency FB" fo:font-weight="bold" style:font-weight-asian="bold" style:font-weight-complex="bold" fo:color="#E97132"/>
    </style:style>
    <style:style style:name="T96" style:parent-style-name="Policepardéfaut" style:family="text">
      <style:text-properties style:font-name="Segoe UI Emoji" style:font-name-complex="Segoe UI Emoji" fo:color="#E97132"/>
    </style:style>
    <style:style style:name="T97" style:parent-style-name="Policepardéfaut" style:family="text">
      <style:text-properties style:font-name="Agency FB" fo:color="#E97132"/>
    </style:style>
    <style:style style:name="T98" style:parent-style-name="Policepardéfaut" style:family="text">
      <style:text-properties style:font-name="Agency FB" fo:font-weight="bold" style:font-weight-asian="bold" style:font-weight-complex="bold" fo:color="#E97132"/>
    </style:style>
    <style:style style:name="P99" style:parent-style-name="Normal" style:list-style-name="LFO5" style:family="paragraph">
      <style:text-properties style:font-name="Agency FB" fo:color="#E97132"/>
    </style:style>
    <style:style style:name="P100" style:parent-style-name="Normal" style:family="paragraph">
      <style:text-properties style:font-name="Agency FB" fo:font-weight="bold" style:font-weight-asian="bold" style:font-weight-complex="bold" fo:color="#E97132"/>
    </style:style>
    <style:style style:name="T101" style:parent-style-name="Policepardéfaut" style:family="text">
      <style:text-properties style:font-name="Agency FB" fo:font-weight="bold" style:font-weight-asian="bold" style:font-weight-complex="bold" fo:color="#E97132"/>
    </style:style>
    <style:style style:name="T102" style:parent-style-name="Policepardéfaut" style:family="text">
      <style:text-properties style:font-name="Agency FB" fo:font-weight="bold" style:font-weight-asian="bold" style:font-weight-complex="bold" fo:color="#E97132"/>
    </style:style>
    <style:style style:name="T103" style:parent-style-name="Policepardéfaut" style:family="text">
      <style:text-properties style:font-name="Agency FB" fo:color="#E97132"/>
    </style:style>
    <style:style style:name="T104" style:parent-style-name="Policepardéfaut" style:family="text">
      <style:text-properties style:font-name="Agency FB" fo:font-style="italic" style:font-style-asian="italic" style:font-style-complex="italic" fo:color="#E97132"/>
    </style:style>
    <style:style style:name="T105" style:parent-style-name="Policepardéfaut" style:family="text">
      <style:text-properties style:font-name="Segoe UI Emoji" style:font-name-complex="Segoe UI Emoji" fo:color="#E97132"/>
    </style:style>
    <style:style style:name="T106" style:parent-style-name="Policepardéfaut" style:family="text">
      <style:text-properties style:font-name="Agency FB" fo:color="#E97132"/>
    </style:style>
    <style:style style:name="T107" style:parent-style-name="Policepardéfaut" style:family="text">
      <style:text-properties style:font-name="Agency FB" fo:color="#E97132"/>
    </style:style>
    <style:style style:name="P108" style:parent-style-name="Normal" style:list-style-name="LFO6" style:family="paragraph">
      <style:text-properties style:font-name="Agency FB" fo:color="#E97132"/>
    </style:style>
    <style:style style:name="P109" style:parent-style-name="Normal" style:list-style-name="LFO6" style:family="paragraph">
      <style:text-properties style:font-name="Agency FB" fo:color="#E97132"/>
    </style:style>
    <style:style style:name="P110" style:parent-style-name="Normal" style:list-style-name="LFO6" style:family="paragraph">
      <style:text-properties style:font-name="Agency FB" fo:color="#E97132"/>
    </style:style>
    <style:style style:name="T111" style:parent-style-name="Policepardéfaut" style:family="text">
      <style:text-properties style:font-name="Segoe UI Emoji" style:font-name-complex="Segoe UI Emoji" fo:font-weight="bold" style:font-weight-asian="bold" style:font-weight-complex="bold" fo:color="#E97132"/>
    </style:style>
    <style:style style:name="T112" style:parent-style-name="Policepardéfaut" style:family="text">
      <style:text-properties style:font-name="Agency FB" fo:font-weight="bold" style:font-weight-asian="bold" style:font-weight-complex="bold" fo:color="#E97132"/>
    </style:style>
    <style:style style:name="T113" style:parent-style-name="Policepardéfaut" style:family="text">
      <style:text-properties style:font-name="Segoe UI Emoji" style:font-name-complex="Segoe UI Emoji" fo:color="#E97132"/>
    </style:style>
    <style:style style:name="T114" style:parent-style-name="Policepardéfaut" style:family="text">
      <style:text-properties style:font-name="Agency FB" fo:color="#E97132"/>
    </style:style>
    <style:style style:name="T115" style:parent-style-name="Policepardéfaut" style:family="text">
      <style:text-properties style:font-name="Agency FB" fo:font-weight="bold" style:font-weight-asian="bold" style:font-weight-complex="bold" fo:color="#E97132"/>
    </style:style>
    <style:style style:name="T116" style:parent-style-name="Policepardéfaut" style:family="text">
      <style:text-properties style:font-name="Segoe UI Emoji" style:font-name-complex="Segoe UI Emoji" fo:color="#E97132"/>
    </style:style>
    <style:style style:name="T117" style:parent-style-name="Policepardéfaut" style:family="text">
      <style:text-properties style:font-name="Agency FB" fo:color="#E97132"/>
    </style:style>
    <style:style style:name="T118" style:parent-style-name="Policepardéfaut" style:family="text">
      <style:text-properties style:font-name="Agency FB" fo:color="#E97132"/>
    </style:style>
    <style:style style:name="T119" style:parent-style-name="Policepardéfaut" style:family="text">
      <style:text-properties style:font-name="Segoe UI Emoji" style:font-name-complex="Segoe UI Emoji" fo:color="#E97132"/>
    </style:style>
    <style:style style:name="T120" style:parent-style-name="Policepardéfaut" style:family="text">
      <style:text-properties style:font-name="Agency FB" fo:color="#E97132"/>
    </style:style>
    <style:style style:name="T121" style:parent-style-name="Policepardéfaut" style:family="text">
      <style:text-properties style:font-name="Segoe UI Emoji" style:font-name-complex="Segoe UI Emoji" fo:font-weight="bold" style:font-weight-asian="bold" style:font-weight-complex="bold" fo:color="#E97132"/>
    </style:style>
    <style:style style:name="T122" style:parent-style-name="Policepardéfaut" style:family="text">
      <style:text-properties style:font-name="Agency FB" fo:font-weight="bold" style:font-weight-asian="bold" style:font-weight-complex="bold" fo:color="#E97132"/>
    </style:style>
    <style:style style:name="T123" style:parent-style-name="Policepardéfaut" style:family="text">
      <style:text-properties style:font-name="Segoe UI Emoji" style:font-name-complex="Segoe UI Emoji" fo:color="#E97132"/>
    </style:style>
    <style:style style:name="T124" style:parent-style-name="Policepardéfaut" style:family="text">
      <style:text-properties style:font-name="Agency FB" fo:color="#E97132"/>
    </style:style>
    <style:style style:name="T125" style:parent-style-name="Policepardéfaut" style:family="text">
      <style:text-properties style:font-name="Agency FB" fo:font-weight="bold" style:font-weight-asian="bold" style:font-weight-complex="bold" fo:color="#E97132"/>
    </style:style>
    <style:style style:name="T126" style:parent-style-name="Policepardéfaut" style:family="text">
      <style:text-properties style:font-name="Agency FB" fo:font-weight="bold" style:font-weight-asian="bold" style:font-weight-complex="bold" fo:color="#E97132"/>
    </style:style>
    <style:style style:name="P127" style:parent-style-name="Normal" style:family="paragraph">
      <style:text-properties style:font-name="Agency FB" fo:font-weight="bold" style:font-weight-asian="bold" style:font-weight-complex="bold" fo:color="#E97132"/>
    </style:style>
    <style:style style:name="T128" style:parent-style-name="Policepardéfaut" style:family="text">
      <style:text-properties style:font-name="Agency FB" fo:color="#E97132"/>
    </style:style>
    <style:style style:name="T129" style:parent-style-name="Policepardéfaut" style:family="text">
      <style:text-properties style:font-name="Arial" style:font-name-complex="Arial" fo:color="#E97132"/>
    </style:style>
    <style:style style:name="T130" style:parent-style-name="Policepardéfaut" style:family="text">
      <style:text-properties style:font-name="Agency FB" fo:color="#E97132"/>
    </style:style>
    <style:style style:name="T131" style:parent-style-name="Policepardéfaut" style:family="text">
      <style:text-properties style:font-name="Segoe UI Emoji" style:font-name-complex="Segoe UI Emoji" fo:color="#E97132"/>
    </style:style>
    <style:style style:name="T132" style:parent-style-name="Policepardéfaut" style:family="text">
      <style:text-properties style:font-name="Agency FB" fo:color="#E97132"/>
    </style:style>
    <style:style style:name="T133" style:parent-style-name="Policepardéfaut" style:family="text">
      <style:text-properties style:font-name="Segoe UI Emoji" style:font-name-complex="Segoe UI Emoji" fo:color="#E97132"/>
    </style:style>
    <style:style style:name="T134" style:parent-style-name="Policepardéfaut" style:family="text">
      <style:text-properties style:font-name="Agency FB" fo:color="#E97132"/>
    </style:style>
    <style:style style:name="P135" style:parent-style-name="Normal" style:list-style-name="LFO7" style:family="paragraph">
      <style:text-properties style:font-name="Agency FB" fo:color="#E97132"/>
    </style:style>
    <style:style style:name="P136" style:parent-style-name="Normal" style:list-style-name="LFO7" style:family="paragraph">
      <style:text-properties style:font-name="Agency FB" fo:color="#E97132"/>
    </style:style>
    <style:style style:name="T137" style:parent-style-name="Policepardéfaut" style:family="text">
      <style:text-properties style:font-name="Segoe UI Emoji" style:font-name-complex="Segoe UI Emoji" fo:font-weight="bold" style:font-weight-asian="bold" style:font-weight-complex="bold" fo:color="#E97132"/>
    </style:style>
    <style:style style:name="T138" style:parent-style-name="Policepardéfaut" style:family="text">
      <style:text-properties style:font-name="Agency FB" fo:font-weight="bold" style:font-weight-asian="bold" style:font-weight-complex="bold" fo:color="#E97132"/>
    </style:style>
    <style:style style:name="T139" style:parent-style-name="Policepardéfaut" style:family="text">
      <style:text-properties style:font-name="Segoe UI Emoji" style:font-name-complex="Segoe UI Emoji" fo:color="#E97132"/>
    </style:style>
    <style:style style:name="T140" style:parent-style-name="Policepardéfaut" style:family="text">
      <style:text-properties style:font-name="Agency FB" fo:color="#E97132"/>
    </style:style>
    <style:style style:name="T141" style:parent-style-name="Policepardéfaut" style:family="text">
      <style:text-properties style:font-name="Agency FB" fo:font-weight="bold" style:font-weight-asian="bold" style:font-weight-complex="bold" fo:color="#E97132"/>
    </style:style>
    <style:style style:name="P142" style:parent-style-name="Normal" style:family="paragraph">
      <style:text-properties style:font-name="Agency FB" fo:color="#E97132"/>
    </style:style>
    <style:style style:name="P143" style:parent-style-name="Normal" style:list-style-name="LFO8" style:family="paragraph">
      <style:text-properties style:font-name="Agency FB" fo:color="#E97132"/>
    </style:style>
    <style:style style:name="P144" style:parent-style-name="Normal" style:list-style-name="LFO8" style:family="paragraph">
      <style:text-properties style:font-name="Agency FB" fo:color="#E97132"/>
    </style:style>
    <style:style style:name="P145" style:parent-style-name="Normal" style:list-style-name="LFO8" style:family="paragraph">
      <style:text-properties style:font-name="Agency FB" fo:color="#E97132"/>
    </style:style>
    <style:style style:name="T146" style:parent-style-name="Policepardéfaut" style:family="text">
      <style:text-properties style:font-name="Segoe UI Emoji" style:font-name-complex="Segoe UI Emoji" fo:color="#E97132"/>
    </style:style>
    <style:style style:name="T147" style:parent-style-name="Policepardéfaut" style:family="text">
      <style:text-properties style:font-name="Agency FB" fo:color="#E97132"/>
    </style:style>
    <style:style style:name="P148" style:parent-style-name="Normal" style:list-style-name="LFO9" style:family="paragraph">
      <style:text-properties style:font-name="Agency FB" fo:color="#E97132"/>
    </style:style>
    <style:style style:name="T149" style:parent-style-name="Policepardéfaut" style:family="text">
      <style:text-properties style:font-name="Segoe UI Emoji" style:font-name-complex="Segoe UI Emoji" fo:font-weight="bold" style:font-weight-asian="bold" style:font-weight-complex="bold" fo:color="#E97132"/>
    </style:style>
    <style:style style:name="T150" style:parent-style-name="Policepardéfaut" style:family="text">
      <style:text-properties style:font-name="Agency FB" fo:font-weight="bold" style:font-weight-asian="bold" style:font-weight-complex="bold" fo:color="#E97132"/>
    </style:style>
    <style:style style:name="T151" style:parent-style-name="Policepardéfaut" style:family="text">
      <style:text-properties style:font-name="Segoe UI Emoji" style:font-name-complex="Segoe UI Emoji" fo:color="#E97132"/>
    </style:style>
    <style:style style:name="T152" style:parent-style-name="Policepardéfaut" style:family="text">
      <style:text-properties style:font-name="Agency FB" fo:color="#E97132"/>
    </style:style>
    <style:style style:name="T153" style:parent-style-name="Policepardéfaut" style:family="text">
      <style:text-properties style:font-name="Agency FB" fo:font-weight="bold" style:font-weight-asian="bold" style:font-weight-complex="bold" fo:color="#E97132"/>
    </style:style>
    <style:style style:name="T154" style:parent-style-name="Policepardéfaut" style:family="text">
      <style:text-properties style:font-name="Segoe UI Emoji" style:font-name-complex="Segoe UI Emoji" fo:color="#E97132"/>
    </style:style>
    <style:style style:name="T155" style:parent-style-name="Policepardéfaut" style:family="text">
      <style:text-properties style:font-name="Agency FB" fo:color="#E97132"/>
    </style:style>
    <style:style style:name="P156" style:parent-style-name="Normal" style:list-style-name="LFO10" style:family="paragraph">
      <style:text-properties style:font-name="Agency FB" fo:color="#E97132"/>
    </style:style>
    <style:style style:name="P157" style:parent-style-name="Normal" style:list-style-name="LFO10" style:family="paragraph">
      <style:text-properties style:font-name="Agency FB" fo:color="#E97132"/>
    </style:style>
    <style:style style:name="T158" style:parent-style-name="Policepardéfaut" style:family="text">
      <style:text-properties style:font-name="Segoe UI Emoji" style:font-name-complex="Segoe UI Emoji" fo:font-weight="bold" style:font-weight-asian="bold" style:font-weight-complex="bold" fo:color="#E97132"/>
    </style:style>
    <style:style style:name="T159" style:parent-style-name="Policepardéfaut" style:family="text">
      <style:text-properties style:font-name="Agency FB" fo:font-weight="bold" style:font-weight-asian="bold" style:font-weight-complex="bold" fo:color="#E97132"/>
    </style:style>
    <style:style style:name="P160" style:parent-style-name="Normal" style:list-style-name="LFO11" style:family="paragraph">
      <style:text-properties style:font-name="Agency FB" fo:color="#E97132"/>
    </style:style>
    <style:style style:name="P161" style:parent-style-name="Normal" style:list-style-name="LFO11" style:family="paragraph">
      <style:text-properties style:font-name="Agency FB" fo:color="#E97132"/>
    </style:style>
    <style:style style:name="P162" style:parent-style-name="Normal" style:list-style-name="LFO11" style:family="paragraph">
      <style:text-properties style:font-name="Agency FB" fo:color="#E97132"/>
    </style:style>
    <style:style style:name="P163" style:parent-style-name="Normal" style:list-style-name="LFO11" style:family="paragraph">
      <style:text-properties style:font-name="Agency FB" fo:color="#E97132"/>
    </style:style>
    <style:style style:name="P164" style:parent-style-name="Normal" style:list-style-name="LFO11" style:family="paragraph">
      <style:text-properties style:font-name="Agency FB" fo:color="#E97132"/>
    </style:style>
    <style:style style:name="T165" style:parent-style-name="Policepardéfaut" style:family="text">
      <style:text-properties style:font-name="Segoe UI Emoji" style:font-name-complex="Segoe UI Emoji" fo:font-weight="bold" style:font-weight-asian="bold" style:font-weight-complex="bold" fo:color="#E97132"/>
    </style:style>
    <style:style style:name="T166" style:parent-style-name="Policepardéfaut" style:family="text">
      <style:text-properties style:font-name="Segoe UI Emoji" style:font-name-complex="Segoe UI Emoji" fo:font-weight="bold" style:font-weight-asian="bold" style:font-weight-complex="bold" fo:color="#E97132"/>
    </style:style>
    <style:style style:name="T167" style:parent-style-name="Policepardéfaut" style:family="text">
      <style:text-properties style:font-name="Agency FB" fo:font-weight="bold" style:font-weight-asian="bold" style:font-weight-complex="bold" fo:color="#E97132"/>
    </style:style>
    <style:style style:name="T168" style:parent-style-name="Policepardéfaut" style:family="text">
      <style:text-properties style:font-name="Segoe UI Emoji" style:font-name-complex="Segoe UI Emoji" fo:color="#E97132"/>
    </style:style>
    <style:style style:name="T169" style:parent-style-name="Policepardéfaut" style:family="text">
      <style:text-properties style:font-name="Agency FB" fo:color="#E97132"/>
    </style:style>
    <style:style style:name="T170" style:parent-style-name="Policepardéfaut" style:family="text">
      <style:text-properties style:font-name="Agency FB" fo:color="#E97132"/>
    </style:style>
    <style:style style:name="T171" style:parent-style-name="Policepardéfaut" style:family="text">
      <style:text-properties style:font-name="Agency FB" fo:color="#E97132"/>
    </style:style>
    <style:style style:name="T172" style:parent-style-name="Policepardéfaut" style:family="text">
      <style:text-properties style:font-name="Segoe UI Emoji" style:font-name-complex="Segoe UI Emoji" fo:color="#E97132"/>
    </style:style>
    <style:style style:name="T173" style:parent-style-name="Policepardéfaut" style:family="text">
      <style:text-properties style:font-name="Agency FB" fo:color="#E97132"/>
    </style:style>
    <style:style style:name="T174" style:parent-style-name="Policepardéfaut" style:family="text">
      <style:text-properties style:font-name="Agency FB" fo:color="#E97132"/>
    </style:style>
    <style:style style:name="T175" style:parent-style-name="Policepardéfaut" style:family="text">
      <style:text-properties style:font-name="Segoe UI Emoji" style:font-name-complex="Segoe UI Emoji" fo:color="#E97132"/>
    </style:style>
    <style:style style:name="T176" style:parent-style-name="Policepardéfaut" style:family="text">
      <style:text-properties style:font-name="Agency FB" fo:color="#E97132"/>
    </style:style>
    <style:style style:name="T177" style:parent-style-name="Policepardéfaut" style:family="text">
      <style:text-properties style:font-name="Agency FB" fo:color="#E97132"/>
    </style:style>
    <style:style style:name="T178" style:parent-style-name="Policepardéfaut" style:family="text">
      <style:text-properties style:font-name="Segoe UI Emoji" style:font-name-complex="Segoe UI Emoji" fo:color="#E97132"/>
    </style:style>
    <style:style style:name="T179" style:parent-style-name="Policepardéfaut" style:family="text">
      <style:text-properties style:font-name="Agency FB" fo:color="#E97132"/>
    </style:style>
    <style:style style:name="T180" style:parent-style-name="Policepardéfaut" style:family="text">
      <style:text-properties style:font-name="Agency FB" style:font-name-complex="Aptos" fo:color="#E97132"/>
    </style:style>
    <style:style style:name="T181" style:parent-style-name="Policepardéfaut" style:family="text">
      <style:text-properties style:font-name="Agency FB" fo:color="#E97132"/>
    </style:style>
    <style:style style:name="P182" style:parent-style-name="Normal" style:family="paragraph">
      <style:paragraph-properties fo:text-align="justify"/>
    </style:style>
    <style:style style:name="P183" style:parent-style-name="Normal"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84" style:parent-style-name="Normal" style:family="paragraph">
      <style:text-properties fo:font-weight="bold" style:font-weight-asian="bold" style:font-weight-complex="bold"/>
    </style:style>
    <style:style style:name="T185" style:parent-style-name="Policepardéfaut" style:family="text">
      <style:text-properties fo:font-style="italic" style:font-style-asian="italic" style:font-style-complex="italic"/>
    </style:style>
    <style:style style:name="P186" style:parent-style-name="Normal" style:family="paragraph">
      <style:text-properties fo:font-weight="bold" style:font-weight-asian="bold" style:font-weight-complex="bold"/>
    </style:style>
    <style:style style:name="P187" style:parent-style-name="Normal" style:family="paragraph">
      <style:text-properties fo:font-weight="bold" style:font-weight-asian="bold" style:font-weight-complex="bold"/>
    </style:style>
    <style:style style:name="P188" style:parent-style-name="Normal" style:family="paragraph">
      <style:text-properties fo:font-weight="bold" style:font-weight-asian="bold" style:font-weight-complex="bold"/>
    </style:style>
    <style:style style:name="P189" style:parent-style-name="Normal" style:family="paragraph">
      <style:text-properties fo:font-weight="bold" style:font-weight-asian="bold" style:font-weight-complex="bold"/>
    </style:style>
    <style:style style:name="P190" style:parent-style-name="Normal"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91" style:parent-style-name="Normal" style:family="paragraph">
      <style:text-properties fo:font-weight="bold" style:font-weight-asian="bold" style:font-weight-complex="bold"/>
    </style:style>
    <style:style style:name="P192" style:parent-style-name="Normal" style:family="paragraph">
      <style:text-properties fo:font-weight="bold" style:font-weight-asian="bold" style:font-weight-complex="bold"/>
    </style:style>
    <style:style style:name="P193" style:parent-style-name="Normal" style:family="paragraph">
      <style:text-properties fo:font-weight="bold" style:font-weight-asian="bold" style:font-weight-complex="bold"/>
    </style:style>
    <style:style style:name="P194" style:parent-style-name="Normal" style:list-style-name="LFO18" style:family="paragraph"/>
    <style:style style:name="P195" style:parent-style-name="Normal" style:list-style-name="LFO18" style:family="paragraph"/>
    <style:style style:name="P196" style:parent-style-name="Normal" style:list-style-name="LFO18" style:family="paragraph"/>
    <style:style style:name="P197" style:parent-style-name="Normal" style:list-style-name="LFO18" style:family="paragraph"/>
    <style:style style:name="P198" style:parent-style-name="Normal" style:family="paragraph">
      <style:text-properties fo:font-weight="bold" style:font-weight-asian="bold" style:font-weight-complex="bold"/>
    </style:style>
    <style:style style:name="P199" style:parent-style-name="Normal" style:family="paragraph">
      <style:text-properties fo:font-weight="bold" style:font-weight-asian="bold" style:font-weight-complex="bold"/>
    </style:style>
    <style:style style:name="T200" style:parent-style-name="Policepardéfaut" style:family="text">
      <style:text-properties style:font-name="Segoe UI Emoji" style:font-name-complex="Segoe UI Emoji"/>
    </style:style>
    <style:style style:name="P201" style:parent-style-name="Normal"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202" style:parent-style-name="Policepardéfaut" style:family="text">
      <style:text-properties fo:font-style="italic" style:font-style-asian="italic" style:font-style-complex="italic"/>
    </style:style>
    <style:style style:name="P203" style:parent-style-name="Normal" style:family="paragraph">
      <style:text-properties fo:font-weight="bold" style:font-weight-asian="bold" style:font-weight-complex="bold"/>
    </style:style>
    <style:style style:name="P204" style:parent-style-name="Normal" style:family="paragraph">
      <style:text-properties fo:font-weight="bold" style:font-weight-asian="bold" style:font-weight-complex="bold"/>
    </style:style>
    <style:style style:name="P205" style:parent-style-name="Normal" style:family="paragraph">
      <style:text-properties fo:font-weight="bold" style:font-weight-asian="bold" style:font-weight-complex="bold"/>
    </style:style>
    <style:style style:name="P206" style:parent-style-name="Normal" style:family="paragraph">
      <style:text-properties fo:font-weight="bold" style:font-weight-asian="bold" style:font-weight-complex="bold" fo:background-color="#FFFF00"/>
    </style:style>
    <style:style style:name="P207" style:parent-style-name="Normal" style:family="paragraph">
      <style:text-properties fo:font-weight="bold" style:font-weight-asian="bold" style:font-weight-complex="bold" fo:background-color="#FFFF00"/>
    </style:style>
    <style:style style:name="P208" style:parent-style-name="Normal" style:family="paragraph">
      <style:text-properties fo:font-weight="bold" style:font-weight-asian="bold" style:font-weight-complex="bold" fo:background-color="#FFFF00"/>
    </style:style>
    <style:style style:name="P209" style:parent-style-name="Normal" style:family="paragraph">
      <style:text-properties fo:font-weight="bold" style:font-weight-asian="bold" style:font-weight-complex="bold" fo:background-color="#FFFF00"/>
    </style:style>
    <style:style style:name="P210" style:parent-style-name="Normal" style:family="paragraph">
      <style:text-properties fo:font-weight="bold" style:font-weight-asian="bold" style:font-weight-complex="bold" fo:background-color="#FFFF00"/>
    </style:style>
    <style:style style:name="T211" style:parent-style-name="Policepardéfaut" style:family="text">
      <style:text-properties fo:font-weight="bold" style:font-weight-asian="bold" style:font-weight-complex="bold" fo:background-color="#FFFF00"/>
    </style:style>
    <style:style style:name="P212" style:parent-style-name="Normal" style:family="paragraph">
      <style:text-properties fo:font-weight="bold" style:font-weight-asian="bold" style:font-weight-complex="bold" fo:background-color="#FFFF00"/>
    </style:style>
    <style:style style:name="P213" style:parent-style-name="Normal" style:family="paragraph">
      <style:text-properties fo:font-weight="bold" style:font-weight-asian="bold" style:font-weight-complex="bold" fo:background-color="#FFFF00"/>
    </style:style>
    <style:style style:name="P214" style:parent-style-name="Normal" style:family="paragraph">
      <style:text-properties fo:font-weight="bold" style:font-weight-asian="bold" style:font-weight-complex="bold" fo:background-color="#FFFF00"/>
    </style:style>
    <style:style style:name="T215" style:parent-style-name="Policepardéfaut" style:family="text">
      <style:text-properties fo:font-weight="bold" style:font-weight-asian="bold" style:font-weight-complex="bold" fo:background-color="#FFFF00"/>
    </style:style>
    <style:style style:name="P216" style:parent-style-name="Normal" style:family="paragraph">
      <style:text-properties fo:font-weight="bold" style:font-weight-asian="bold" style:font-weight-complex="bold" fo:background-color="#FFFF00"/>
    </style:style>
    <style:style style:name="P217" style:parent-style-name="Normal" style:family="paragraph">
      <style:text-properties fo:font-weight="bold" style:font-weight-asian="bold" style:font-weight-complex="bold" fo:background-color="#FFFF00"/>
    </style:style>
    <style:style style:name="P218" style:parent-style-name="Normal" style:family="paragraph">
      <style:text-properties fo:font-weight="bold" style:font-weight-asian="bold" style:font-weight-complex="bold" fo:background-color="#FFFF00"/>
    </style:style>
    <style:style style:name="P219" style:parent-style-name="Normal" style:family="paragraph">
      <style:text-properties fo:font-weight="bold" style:font-weight-asian="bold" style:font-weight-complex="bold" fo:background-color="#FFFF00"/>
    </style:style>
    <style:style style:name="T220" style:parent-style-name="Policepardéfaut" style:family="text">
      <style:text-properties fo:font-weight="bold" style:font-weight-asian="bold" style:font-weight-complex="bold" fo:background-color="#FFFF00"/>
    </style:style>
    <style:style style:name="P221" style:parent-style-name="Normal" style:family="paragraph">
      <style:text-properties fo:font-weight="bold" style:font-weight-asian="bold" style:font-weight-complex="bold" fo:background-color="#FFFF00"/>
    </style:style>
    <style:style style:name="P222" style:parent-style-name="Normal" style:family="paragraph">
      <style:text-properties fo:font-weight="bold" style:font-weight-asian="bold" style:font-weight-complex="bold" fo:background-color="#FFFF00"/>
    </style:style>
    <style:style style:name="T223" style:parent-style-name="Policepardéfaut" style:family="text">
      <style:text-properties fo:font-weight="bold" style:font-weight-asian="bold" style:font-weight-complex="bold" fo:background-color="#FFFF00"/>
    </style:style>
    <style:style style:name="P224" style:parent-style-name="Normal" style:family="paragraph">
      <style:text-properties fo:font-weight="bold" style:font-weight-asian="bold" style:font-weight-complex="bold"/>
    </style:style>
    <style:style style:name="P225" style:parent-style-name="Normal"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26" style:parent-style-name="Normal" style:family="paragraph">
      <style:text-properties fo:font-weight="bold" style:font-weight-asian="bold" style:font-weight-complex="bold"/>
    </style:style>
    <style:style style:name="T227" style:parent-style-name="Policepardéfaut" style:family="text">
      <style:text-properties fo:font-style="italic" style:font-style-asian="italic" style:font-style-complex="italic"/>
    </style:style>
    <style:style style:name="P228" style:parent-style-name="Normal" style:family="paragraph">
      <style:text-properties fo:font-weight="bold" style:font-weight-asian="bold" style:font-weight-complex="bold"/>
    </style:style>
    <style:style style:name="P229" style:parent-style-name="Normal" style:family="paragraph">
      <style:text-properties fo:font-weight="bold" style:font-weight-asian="bold" style:font-weight-complex="bold"/>
    </style:style>
    <style:style style:name="T230" style:parent-style-name="Policepardéfaut" style:family="text">
      <style:text-properties fo:font-style="italic" style:font-style-asian="italic" style:font-style-complex="italic"/>
    </style:style>
    <style:style style:name="P231" style:parent-style-name="Normal" style:family="paragraph">
      <style:text-properties fo:font-weight="bold" style:font-weight-asian="bold" style:font-weight-complex="bold"/>
    </style:style>
    <style:style style:name="P232" style:parent-style-name="Normal" style:family="paragraph">
      <style:text-properties fo:font-weight="bold" style:font-weight-asian="bold" style:font-weight-complex="bold"/>
    </style:style>
    <style:style style:name="P233" style:parent-style-name="Normal" style:family="paragraph">
      <style:text-properties fo:font-weight="bold" style:font-weight-asian="bold" style:font-weight-complex="bold"/>
    </style:style>
    <style:style style:name="P234" style:parent-style-name="Normal" style:family="paragraph">
      <style:text-properties fo:font-weight="bold" style:font-weight-asian="bold" style:font-weight-complex="bold"/>
    </style:style>
    <style:style style:name="P235" style:parent-style-name="Normal"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36" style:parent-style-name="Normal"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37" style:parent-style-name="Normal"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238" style:parent-style-name="Policepardéfaut" style:family="text">
      <style:text-properties style:font-name="Segoe UI Emoji" style:font-name-complex="Segoe UI Emoji"/>
    </style:style>
    <style:style style:name="T239" style:parent-style-name="Policepardéfaut" style:family="text">
      <style:text-properties style:font-name="Segoe UI Emoji" style:font-name-complex="Segoe UI Emoji"/>
    </style:style>
    <style:style style:name="T240" style:parent-style-name="Policepardéfaut" style:family="text">
      <style:text-properties style:font-name="Segoe UI Emoji" style:font-name-complex="Segoe UI Emoji"/>
    </style:style>
    <style:style style:name="P241" style:parent-style-name="Normal"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family="graphic" style:name="a2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
      <style:graphic-properties draw:fill="none" draw:stroke="solid" svg:stroke-width="0.01042in" svg:stroke-color="#a0a0a0" svg:stroke-opacity="100%" draw:stroke-linejoin="miter" svg:stroke-linecap="butt"/>
    </style:style>
    <style:style style:family="graphic" style:name="a11">
      <style:graphic-properties draw:fill="none" draw:stroke="solid" svg:stroke-width="0.01042in" svg:stroke-color="#a0a0a0" svg:stroke-opacity="100%" draw:stroke-linejoin="miter" svg:stroke-linecap="butt"/>
    </style:style>
    <style:style style:family="graphic" style:name="a1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graphic-properties draw:fill="none" draw:stroke="solid" svg:stroke-width="0.01042in" svg:stroke-color="#a0a0a0" svg:stroke-opacity="100%" draw:stroke-linejoin="miter" svg:stroke-linecap="butt"/>
    </style:style>
    <style:style style:family="graphic" style:name="a1">
      <style:graphic-properties draw:fill="none" draw:stroke="solid" svg:stroke-width="0.01042in" svg:stroke-color="#a0a0a0" svg:stroke-opacity="100%" draw:stroke-linejoin="miter" svg:stroke-linecap="butt"/>
    </style:style>
    <style:style style:family="graphic" style:name="a2">
      <style:graphic-properties draw:fill="none" draw:stroke="solid" svg:stroke-width="0.01042in" svg:stroke-color="#a0a0a0" svg:stroke-opacity="100%" draw:stroke-linejoin="miter" svg:stroke-linecap="butt"/>
    </style:style>
    <style:style style:family="graphic" style:name="a3">
      <style:graphic-properties draw:fill="none" draw:stroke="solid" svg:stroke-width="0.01042in" svg:stroke-color="#a0a0a0" svg:stroke-opacity="100%" draw:stroke-linejoin="miter" svg:stroke-linecap="butt"/>
    </style:style>
    <style:style style:family="graphic" style:name="a4">
      <style:graphic-properties draw:fill="none" draw:stroke="solid" svg:stroke-width="0.01042in" svg:stroke-color="#a0a0a0" svg:stroke-opacity="100%" draw:stroke-linejoin="miter" svg:stroke-linecap="butt"/>
    </style:style>
    <style:style style:family="graphic" style:name="a5">
      <style:graphic-properties draw:fill="none" draw:stroke="solid" svg:stroke-width="0.01042in" svg:stroke-color="#a0a0a0" svg:stroke-opacity="100%" draw:stroke-linejoin="miter" svg:stroke-linecap="butt"/>
    </style:style>
    <style:style style:family="graphic" style:name="a6">
      <style:graphic-properties draw:fill="none" draw:stroke="solid" svg:stroke-width="0.01042in" svg:stroke-color="#a0a0a0" svg:stroke-opacity="100%" draw:stroke-linejoin="miter" svg:stroke-linecap="butt"/>
    </style:style>
    <style:style style:family="graphic" style:name="a7">
      <style:graphic-properties draw:fill="none" draw:stroke="solid" svg:stroke-width="0.01042in" svg:stroke-color="#a0a0a0" svg:stroke-opacity="100%" draw:stroke-linejoin="miter" svg:stroke-linecap="butt"/>
    </style:style>
    <style:style style:family="graphic" style:name="a8">
      <style:graphic-properties draw:fill="none" draw:stroke="solid" svg:stroke-width="0.01042in" svg:stroke-color="#a0a0a0" svg:stroke-opacity="100%" draw:stroke-linejoin="miter" svg:stroke-linecap="butt"/>
    </style:style>
    <style:style style:family="graphic" style:name="a9">
      <style:graphic-properties draw:fill="none" draw:stroke="solid" svg:stroke-width="0.01042in" svg:stroke-color="#a0a0a0" svg:stroke-opacity="100%" draw:stroke-linejoin="miter" svg:stroke-linecap="butt"/>
    </style:style>
  </office:automatic-styles>
  <office:body>
    <office:text text:use-soft-page-breaks="true">
      <text:p text:style-name="P1">Accueil :<text:s/></text:p>
      <text:p text:style-name="P2">Les Contes de Zoufftgen</text:p>
      <text:p text:style-name="P3">Une collection de livres jeunesse imaginée et illustrée par Hélène Hardy, ancrée dans un village réel, où se mêlent nature, mémoire et transmission.</text:p>
      <text:p text:style-name="P4">Un univers à lire… et à transmettre.</text:p>
      <text:p text:style-name="P5"/>
      <text:p text:style-name="P6">La collection</text:p>
      <text:p text:style-name="P7">Une collection ancrée dans le réel</text:p>
      <text:p text:style-name="P8"><text:span text:style-name="T9">Les Contes de Zoufftgen</text:span><text:s/>forment une collection de livres jeunesse, écrits et illustrés par Hélène Hardy.</text:p>
      <text:p text:style-name="P10">Chaque histoire prend racine dans un lieu réel du village, entre mémoire et imaginaire.</text:p>
      <text:p text:style-name="P11"><text:span text:style-name="T12"><draw:custom-shape svg:x="0in" svg:y="0in" svg:width="45.51042in" svg:height="0.00139in" draw:id="id0" draw:style-name="a0" draw:name="Horizontal Line 121" text:anchor-type="as-char"><svg:title/><svg:desc/><draw:enhanced-geometry draw:type="non-primitive" svg:viewBox="0 0 21600 21600" draw:enhanced-path="M 0 0 L 21600 0 21600 21600 0 21600 Z N"/></draw:custom-shape></text:span></text:p>
      <text:p text:style-name="P13">Une édition soignée</text:p>
      <text:p text:style-name="P14">Les ouvrages de la collection sont conçus avec exigence :</text:p>
      <text:list text:style-name="LFO1" text:continue-numbering="true">
        <text:list-item>
          <text:p text:style-name="P15">couverture rigide<text:s/></text:p>
        </text:list-item>
        <text:list-item>
          <text:p text:style-name="P16">papier intérieur épais au toucher mat</text:p>
        </text:list-item>
        <text:list-item>
          <text:p text:style-name="P17">finitions délicates (vernis sélectif, dorure)<text:s/></text:p>
        </text:list-item>
      </text:list>
      <text:p text:style-name="P18">Chaque livre est pensé<text:s/>comme un objet à part entière, destiné à être conservé, offert et transmis.</text:p>
      <text:p text:style-name="P19"><text:span text:style-name="T20"><draw:custom-shape svg:x="0in" svg:y="0in" svg:width="45.51042in" svg:height="0.00139in" draw:id="id1" draw:style-name="a1" draw:name="Horizontal Line 122" text:anchor-type="as-char"><svg:title/><svg:desc/><draw:enhanced-geometry draw:type="non-primitive" svg:viewBox="0 0 21600 21600" draw:enhanced-path="M 0 0 L 21600 0 21600 21600 0 21600 Z N"/></draw:custom-shape></text:span></text:p>
      <text:p text:style-name="P21">Les ouvrages</text:p>
      <text:p text:style-name="P22"><text:span text:style-name="T23"><draw:custom-shape svg:x="0in" svg:y="0in" svg:width="45.51042in" svg:height="0.00139in" draw:id="id2" draw:style-name="a2" draw:name="Horizontal Line 123" text:anchor-type="as-char"><svg:title/><svg:desc/><draw:enhanced-geometry draw:type="non-primitive" svg:viewBox="0 0 21600 21600" draw:enhanced-path="M 0 0 L 21600 0 21600 21600 0 21600 Z N"/></draw:custom-shape></text:span></text:p>
      <text:p text:style-name="P24">Le petit zouffarceur</text:p>
      <text:p text:style-name="P25"><text:span text:style-name="T26">— Tome 1 de la collection</text:span></text:p>
      <text:p text:style-name="P27">Une nuit de Noël à Zoufftgen, des événements étranges viennent troubler le village…</text:p>
      <text:p text:style-name="P28"><text:span text:style-name="T29">👉</text:span><text:s/>Voir le livre</text:p>
      <text:p text:style-name="P30"><text:span text:style-name="T31"><draw:custom-shape svg:x="0in" svg:y="0in" svg:width="45.51042in" svg:height="0.00139in" draw:id="id3" draw:style-name="a3" draw:name="Horizontal Line 124" text:anchor-type="as-char"><svg:title/><svg:desc/><draw:enhanced-geometry draw:type="non-primitive" svg:viewBox="0 0 21600 21600" draw:enhanced-path="M 0 0 L 21600 0 21600 21600 0 21600 Z N"/></draw:custom-shape></text:span></text:p>
      <text:p text:style-name="P32">La maison du petit zouffarceur</text:p>
      <text:soft-page-break/>
      <text:p text:style-name="P33"><text:span text:style-name="T34">— Tome 2 de la collection</text:span></text:p>
      <text:p text:style-name="P35">Les habitants s’inquiètent : les noisettes déposées aux fenêtres ne disparaissent plus…</text:p>
      <text:p text:style-name="P36"><text:span text:style-name="T37">👉</text:span><text:s/>Voir le livre</text:p>
      <text:p text:style-name="P38"><draw:custom-shape svg:x="0in" svg:y="0in" svg:width="45.51042in" svg:height="0.00139in" draw:id="id4" draw:style-name="a4" draw:name="Horizontal Line 125" text:anchor-type="as-char"><svg:title/><svg:desc/><draw:enhanced-geometry draw:type="non-primitive" svg:viewBox="0 0 21600 21600" draw:enhanced-path="M 0 0 L 21600 0 21600 21600 0 21600 Z N"/></draw:custom-shape></text:p>
      <text:p text:style-name="P39">Papa Sanglier et sa dent en or</text:p>
      <text:p text:style-name="P40"><text:span text:style-name="T41">— Tome 3 de la collection</text:span></text:p>
      <text:p text:style-name="P42">Dans la forêt de Zoufftgen, une simple<text:s/>promenade devient une aventure inattendue.</text:p>
      <text:p text:style-name="P43"><text:span text:style-name="T44">👉</text:span><text:s/>Voir le livre</text:p>
      <text:p text:style-name="P45">Chaque conte prolonge un même univers, où les lieux existent, où les histoires s’inscrivent dans le réel, et où les livres deviennent des objets de mémoire.</text:p>
      <text:p text:style-name="P46"><draw:custom-shape svg:x="0in" svg:y="0in" svg:width="45.51042in" svg:height="0.00139in" draw:id="id5" draw:style-name="a5" draw:name="Horizontal Line 126" text:anchor-type="as-char"><svg:title/><svg:desc/><draw:enhanced-geometry draw:type="non-primitive" svg:viewBox="0 0 21600 21600" draw:enhanced-path="M 0 0 L 21600 0 21600 21600 0 21600 Z N"/></draw:custom-shape></text:p>
      <text:p text:style-name="P47">Obtenir les ouvrages</text:p>
      <text:p text:style-name="P48">Les livres sont disponibles :</text:p>
      <text:list text:style-name="LFO2" text:continue-numbering="true">
        <text:list-item>
          <text:p text:style-name="P49">en commande en ligne (livraison par La Poste)<text:s/></text:p>
        </text:list-item>
        <text:list-item>
          <text:p text:style-name="P50">en retrait à Zoufftgen, sur rendez-vous<text:s/></text:p>
        </text:list-item>
        <text:list-item>
          <text:p text:style-name="P51">dans la boutique de créateurs <text:a xlink:href="https://www.facebook.com/artisanarts57" office:target-frame-name="_top" xlink:show="replace"><text:span text:style-name="Lienhypertexte">Artisan'Arts</text:span></text:a> de Volmerange-Les-Mines</text:p>
        </text:list-item>
      </text:list>
      <text:p text:style-name="P52"><draw:custom-shape svg:x="0in" svg:y="0in" svg:width="45.51042in" svg:height="0.00139in" draw:id="id6" draw:style-name="a6" draw:name="Horizontal Line 127" text:anchor-type="as-char"><svg:title/><svg:desc/><draw:enhanced-geometry draw:type="non-primitive" svg:viewBox="0 0 21600 21600" draw:enhanced-path="M 0 0 L 21600 0 21600 21600 0 21600 Z N"/></draw:custom-shape></text:p>
      <text:p text:style-name="P53">Une collection en devenir</text:p>
      <text:p text:style-name="P54">L’univers des<text:s/><text:span text:style-name="T55">Contes de Zoufftgen</text:span><text:s/>continue de s’enrichir.</text:p>
      <text:p text:style-name="P56">De nouveaux récits viendront prolonger la collection, ainsi que des objets inspirés des contes, réalisés en petites séries.</text:p>
      <text:p text:style-name="P57">Page pour chaque livre :</text:p>
      <text:p text:style-name="P58">Le Petit<text:s/>Zouffarceur</text:p>
      <text:p text:style-name="P59"><text:span text:style-name="T60">— Tome 1 de la collection Les Contes de Zoufftgen</text:span></text:p>
      <text:p text:style-name="P61"><draw:custom-shape svg:x="0in" svg:y="0in" svg:width="45.51042in" svg:height="0.00139in" draw:id="id7" draw:style-name="a7" draw:name="Horizontal Line 171" text:anchor-type="as-char"><svg:title/><svg:desc/><draw:enhanced-geometry draw:type="non-primitive" svg:viewBox="0 0 21600 21600" draw:enhanced-path="M 0 0 L 21600 0 21600 21600 0 21600 Z N"/></draw:custom-shape></text:p>
      <text:p text:style-name="P62">Un conte ancré dans le village</text:p>
      <text:p text:style-name="P63">À Zoufftgen, certains lieux semblent ordinaires… jusqu’à ce que l’on prenne le temps de les regarder autrement.</text:p>
      <text:soft-page-break/>
      <text:p text:style-name="P64">Dans ce premier conte, une présence discrète semble veiller sur le village, et rappelle que les histoires naissent souvent là où l’on ne les attend pas.</text:p>
      <text:p text:style-name="P65"><draw:custom-shape svg:x="0in" svg:y="0in" svg:width="45.51042in" svg:height="0.00139in" draw:id="id8" draw:style-name="a8" draw:name="Horizontal Line 172" text:anchor-type="as-char"><svg:title/><svg:desc/><draw:enhanced-geometry draw:type="non-primitive" svg:viewBox="0 0 21600 21600" draw:enhanced-path="M 0 0 L 21600 0 21600 21600 0 21600 Z N"/></draw:custom-shape></text:p>
      <text:p text:style-name="P66">Un livre pensé comme un objet</text:p>
      <text:p text:style-name="P67">Cet ouvrage est conçu avec soin :</text:p>
      <text:list text:style-name="LFO3" text:continue-numbering="true">
        <text:list-item>
          <text:p text:style-name="P68">format : 21 × 21 cm<text:s/></text:p>
        </text:list-item>
        <text:list-item>
          <text:p text:style-name="P69">couverture rigide<text:s/></text:p>
        </text:list-item>
        <text:list-item>
          <text:p text:style-name="P70">papier intérieur épais au toucher mat</text:p>
        </text:list-item>
        <text:list-item>
          <text:p text:style-name="P71">finitions délicates<text:s/>avec<text:s/>vernis sélectif</text:p>
        </text:list-item>
      </text:list>
      <text:p text:style-name="P72">Un livre à lire, à offrir, et à transmettre –<text:s/></text:p>
      <text:p text:style-name="P73"><text:span text:style-name="T74">chaque détail étant pensé pour offrir une expérience de lecture durable, à la fois sensible et matérielle.</text:span></text:p>
      <text:p text:style-name="P75"/>
      <text:p text:style-name="P76"><draw:custom-shape svg:x="0in" svg:y="0in" svg:width="45.51042in" svg:height="0.00139in" draw:id="id9" draw:style-name="a9" draw:name="Horizontal Line 173" text:anchor-type="as-char"><svg:title/><svg:desc/><draw:enhanced-geometry draw:type="non-primitive" svg:viewBox="0 0 21600 21600" draw:enhanced-path="M 0 0 L 21600 0 21600 21600 0 21600 Z N"/></draw:custom-shape></text:p>
      <text:h text:style-name="P77" text:outline-level="2">Dans le livre</text:h>
      <text:p text:style-name="P78">Au fil des pages, l’histoire se prolonge à<text:s/>travers des moments à vivre et à partager :</text:p>
      <text:p text:style-name="P79">• une histoire illustrée, à lire et à raconter<text:line-break/>• apprendre à dessiner un personnage du conte, pas à pas<text:line-break/>• découvrir un lieu réel du village, à l’origine du récit<text:line-break/>• réaliser une recette inspirée de<text:s/>l’univers du livre</text:p>
      <text:p text:style-name="P80"><text:span text:style-name="T81">Un livre qui se lit… et qui se vit.</text:span></text:p>
      <text:p text:style-name="P82"/>
      <text:p text:style-name="P83"><draw:custom-shape svg:x="0in" svg:y="0in" svg:width="45.51042in" svg:height="0.00139in" draw:id="id10" draw:style-name="a10" draw:name="Horizontal Line 174" text:anchor-type="as-char"><svg:title/><svg:desc/><draw:enhanced-geometry draw:type="non-primitive" svg:viewBox="0 0 21600 21600" draw:enhanced-path="M 0 0 L 21600 0 21600 21600 0 21600 Z N"/></draw:custom-shape></text:p>
      <text:p text:style-name="P84">Informations</text:p>
      <text:list text:style-name="LFO4" text:continue-numbering="true">
        <text:list-item>
          <text:p text:style-name="P85">Âge conseillé : à partir de 3 ans<text:s/></text:p>
        </text:list-item>
        <text:list-item>
          <text:p text:style-name="P86">Prix : 18 €<text:s/></text:p>
        </text:list-item>
        <text:list-item>
          <text:p text:style-name="P87">Disponible en livraison ou en retrait à Zoufftgen<text:s/></text:p>
        </text:list-item>
      </text:list>
      <text:p text:style-name="P88"><draw:custom-shape svg:x="0in" svg:y="0in" svg:width="45.51042in" svg:height="0.00139in" draw:id="id11" draw:style-name="a11" draw:name="Horizontal Line 175" text:anchor-type="as-char"><svg:title/><svg:desc/><draw:enhanced-geometry draw:type="non-primitive" svg:viewBox="0 0 21600 21600" draw:enhanced-path="M 0 0 L 21600 0 21600 21600 0 21600 Z N"/></draw:custom-shape></text:p>
      <text:p text:style-name="P89">Obtenir l’ouvrage</text:p>
      <text:p text:style-name="P90"><text:span text:style-name="T91">👉</text:span><text:s/>Ajouter au panier<text:s/><text:span text:style-name="T92">(ou bouton Stripe actuel)</text:span></text:p>
      <text:p text:style-name="P93">Une dédicace peut être ajoutée sur simple demande, lors de votre commande ou via la page de contact.</text:p>
      <text:soft-page-break/>
      <text:p text:style-name="Normal"><text:span text:style-name="T94">🟢</text:span><text:span text:style-name="T95"><text:s/>1. En haut de page (très important)</text:span></text:p>
      <text:p text:style-name="Normal"><text:span text:style-name="T96">👉</text:span><text:span text:style-name="T97"><text:s/></text:span><text:span text:style-name="T98">IMAGE PRINCIPALE</text:span></text:p>
      <text:list text:style-name="LFO5" text:continue-numbering="true">
        <text:list-item>
          <text:p text:style-name="P99">couverture OU photo mise en scène (idéal plus tard)<text:s/></text:p>
        </text:list-item>
      </text:list>
      <text:p text:style-name="P100">Structure :</text:p>
      <text:p text:style-name="Normal"><text:span text:style-name="T101">[IMAGE]</text:span></text:p>
      <text:p text:style-name="Normal"><text:span text:style-name="T102">Le Petit Zouffarceur</text:span><text:span text:style-name="T103"><text:line-break/></text:span><text:span text:style-name="T104">Tome 1…</text:span></text:p>
      <text:p text:style-name="Normal"><text:span text:style-name="T105">👉</text:span><text:span text:style-name="T106"><text:s/></text:span><text:span text:style-name="T107">Pourquoi :</text:span></text:p>
      <text:list text:style-name="LFO6" text:continue-numbering="true">
        <text:list-item>
          <text:p text:style-name="P108">impact immédiat<text:s/></text:p>
        </text:list-item>
        <text:list-item>
          <text:p text:style-name="P109">émotion<text:s/></text:p>
        </text:list-item>
        <text:list-item>
          <text:p text:style-name="P110">entrée visuelle forte<text:s/></text:p>
        </text:list-item>
      </text:list>
      <text:p text:style-name="Normal"><text:span text:style-name="T111">🟢</text:span><text:span text:style-name="T112"><text:s/>2. Après l’accroche narrative</text:span></text:p>
      <text:p text:style-name="Normal"><text:span text:style-name="T113">👉</text:span><text:span text:style-name="T114"><text:s/></text:span><text:span text:style-name="T115">PAS d’image ici</text:span></text:p>
      <text:p text:style-name="Normal"><text:span text:style-name="T116">👉</text:span><text:span text:style-name="T117"><text:s/>Laisse respirer le texte</text:span><text:span text:style-name="T118"><text:line-break/></text:span><text:span text:style-name="T119">👉</text:span><text:span text:style-name="T120"><text:s/>très important pour ton positionnement haut de gamme</text:span></text:p>
      <text:p text:style-name="Normal"><text:span text:style-name="T121">🟢</text:span><text:span text:style-name="T122"><text:s/>3. Après le bloc “Le livre”</text:span></text:p>
      <text:p text:style-name="Normal"><text:span text:style-name="T123">👉</text:span><text:span text:style-name="T124"><text:s/></text:span><text:span text:style-name="T125">1 image<text:s/></text:span><text:span text:style-name="T126">intérieure</text:span></text:p>
      <text:p text:style-name="P127">Structure :</text:p>
      <text:p text:style-name="Normal"><text:span text:style-name="T128">texte<text:s/></text:span><text:span text:style-name="T129">→</text:span><text:span text:style-name="T130"><text:line-break/></text:span><text:span text:style-name="T131">👉</text:span><text:span text:style-name="T132"><text:s/>image double page</text:span></text:p>
      <text:p text:style-name="Normal"><text:span text:style-name="T133">👉</text:span><text:span text:style-name="T134"><text:s/>Pourquoi :</text:span></text:p>
      <text:list text:style-name="LFO7" text:continue-numbering="true">
        <text:list-item>
          <text:p text:style-name="P135">on donne envie d’ouvrir<text:s/></text:p>
        </text:list-item>
        <text:list-item>
          <text:p text:style-name="P136">on rend concret<text:s/></text:p>
        </text:list-item>
      </text:list>
      <text:p text:style-name="Normal"><text:span text:style-name="T137">🟢</text:span><text:span text:style-name="T138"><text:s/>4. Après le bloc “L’objet”</text:span></text:p>
      <text:p text:style-name="Normal"><text:span text:style-name="T139">👉</text:span><text:span text:style-name="T140"><text:s/></text:span><text:span text:style-name="T141">(optionnel) 1 image détail</text:span></text:p>
      <text:p text:style-name="P142">Exemples :</text:p>
      <text:list text:style-name="LFO8" text:continue-numbering="true">
        <text:list-item>
          <text:p text:style-name="P143">tranche du livre<text:s/></text:p>
        </text:list-item>
        <text:list-item>
          <text:p text:style-name="P144">couverture avec lumière<text:s/></text:p>
        </text:list-item>
        <text:list-item>
          <text:p text:style-name="P145">détail dorure<text:s/></text:p>
        </text:list-item>
      </text:list>
      <text:soft-page-break/>
      <text:p text:style-name="Normal"><text:span text:style-name="T146">👉</text:span><text:span text:style-name="T147"><text:s/>Pourquoi :</text:span></text:p>
      <text:list text:style-name="LFO9" text:continue-numbering="true">
        <text:list-item>
          <text:p text:style-name="P148">renforcer la qualité perçue<text:s/></text:p>
        </text:list-item>
      </text:list>
      <text:p text:style-name="Normal"><text:span text:style-name="T149">🟢</text:span><text:span text:style-name="T150"><text:s/>5. Zone achat</text:span></text:p>
      <text:p text:style-name="Normal"><text:span text:style-name="T151">👉</text:span><text:span text:style-name="T152"><text:s/></text:span><text:span text:style-name="T153">PAS d’image ici</text:span></text:p>
      <text:p text:style-name="Normal"><text:span text:style-name="T154">👉</text:span><text:span text:style-name="T155"><text:s/>on garde :</text:span></text:p>
      <text:list text:style-name="LFO10" text:continue-numbering="true">
        <text:list-item>
          <text:p text:style-name="P156">sobriété<text:s/></text:p>
        </text:list-item>
        <text:list-item>
          <text:p text:style-name="P157">clarté<text:s/></text:p>
        </text:list-item>
      </text:list>
      <text:p text:style-name="Normal"><text:span text:style-name="T158">🎯</text:span><text:span text:style-name="T159"><text:s/>Résumé visuel idéal</text:span></text:p>
      <text:list text:style-name="LFO11" text:continue-numbering="true">
        <text:list-item>
          <text:p text:style-name="P160">image forte en haut<text:s/></text:p>
        </text:list-item>
        <text:list-item>
          <text:p text:style-name="P161">texte<text:s/></text:p>
        </text:list-item>
        <text:list-item>
          <text:p text:style-name="P162">image intérieure<text:s/></text:p>
        </text:list-item>
        <text:list-item>
          <text:p text:style-name="P163">(optionnel) image détail<text:s/></text:p>
        </text:list-item>
        <text:list-item>
          <text:p text:style-name="P164">achat<text:s/></text:p>
        </text:list-item>
      </text:list>
      <text:p text:style-name="Normal"><text:span text:style-name="T165">⚠</text:span><text:span text:style-name="T166">️</text:span><text:span text:style-name="T167"><text:s/>Ce qu’il ne faut surtout pas faire</text:span></text:p>
      <text:p text:style-name="Normal"><text:span text:style-name="T168">❌</text:span><text:span text:style-name="T169"><text:s/>galerie en<text:s/></text:span><text:span text:style-name="T170">haut (plusieurs images)</text:span><text:span text:style-name="T171"><text:line-break/></text:span><text:span text:style-name="T172">❌</text:span><text:span text:style-name="T173"><text:s/>images entre chaque paragraphe</text:span><text:span text:style-name="T174"><text:line-break/></text:span><text:span text:style-name="T175">❌</text:span><text:span text:style-name="T176"><text:s/>images trop nombreuses</text:span><text:span text:style-name="T177"><text:line-break/></text:span><text:span text:style-name="T178">❌</text:span><text:span text:style-name="T179"><text:s/>images<text:s/></text:span><text:span text:style-name="T180">“</text:span><text:span text:style-name="T181">techniques”</text:span></text:p>
      <text:p text:style-name="P182"/>
      <text:p text:style-name="P183">Objets narratifs</text:p>
      <text:p text:style-name="Normal">Certaines histoires ne tiennent pas seulement dans les pages. Elles prennent parfois une autre forme, plus discrète, plus tangible.</text:p>
      <text:p text:style-name="P184">Des objets issus des contes</text:p>
      <text:p text:style-name="Normal">Dans l’atelier, certains éléments des<text:s/><text:span text:style-name="T185">Contes de Zoufftgen</text:span><text:s/>prennent vie autrement. Un détail aperçu dans une illustration, une forme évoquée dans un récit… un fragment d’univers qui se détache, et devient objet.</text:p>
      <text:p text:style-name="P186">Un travail lent, en petites séries</text:p>
      <text:p text:style-name="Normal">Ces pièces sont réalisées à la main, en petites séries, ou de manière unique. Elles demandent du temps, de la précision, et ne suivent pas de rythme de production régulier. Chaque objet est ainsi lié à un moment, à une saison, à une histoire.</text:p>
      <text:soft-page-break/>
      <text:p text:style-name="P187">Des objets à part entière</text:p>
      <text:p text:style-name="Normal">Plus que des éléments décoratifs, ces pièces prolongent les récits. Elles peuvent être posées, observées, manipulées… et continuent, à leur manière, de raconter.</text:p>
      <text:p text:style-name="P188">Premières formes</text:p>
      <text:p text:style-name="Normal">Les premières pièces prennent la forme de glands, inspirés de l’univers de notre village. Certains sont creusés, habités, éclairés de l’intérieur… comme s’ils abritaient une présence discrète.</text:p>
      <text:p text:style-name="P189">À venir</text:p>
      <text:p text:style-name="Normal">Ces objets ne sont pas encore proposés à la vente. Ils apparaîtront progressivement, au fil du temps et des créations.</text:p>
      <text:p text:style-name="P190">Interventions d’autrice &amp; parcours pédagogiques<text:s/></text:p>
      <text:p text:style-name="P191">Autour du récit, du réel et de l’imaginaire</text:p>
      <text:p text:style-name="Normal">À travers les Contes de Zoufftgen, je propose des interventions dans les écoles (maternelles et élémentaires), les bibliothèques ainsi que les structures culturelles ou périscolaires.</text:p>
      <text:p text:style-name="Normal">Ces rencontres prennent la forme de lectures vivantes, d’échanges et de moments de transmission autour de l’histoire, de la nature et du lien entre la fiction et le réel.</text:p>
      <text:p text:style-name="Normal"><draw:custom-shape svg:x="0in" svg:y="0in" svg:width="45.51042in" svg:height="0.00139in" draw:z-index="0" draw:id="id12" draw:style-name="a12" draw:name="Horizontal Line 25" text:anchor-type="as-char"><svg:title/><svg:desc/><draw:enhanced-geometry draw:type="non-primitive" svg:viewBox="0 0 21600 21600" draw:enhanced-path="M 0 0 L 21600 0 21600 21600 0 21600 Z N"/></draw:custom-shape></text:p>
      <text:p text:style-name="P192">Une approche singulière</text:p>
      <text:p text:style-name="Normal">Mes histoires se déroulent à Zoufftgen, un village bien réel. Lors des interventions, les enfants découvrent que les lieux évoqués dans les contes existent réellement : un vieil arbre, une maison, un chemin de terre…</text:p>
      <text:p text:style-name="Normal">Ce lien entre l’imaginaire et le territoire permet d’ancrer les récits dans le concret et d’ouvrir un autre regard sur ce qui nous entoure : les arbres, les chemins, les lieux familiers que l’on finit parfois par ne plus voir.</text:p>
      <text:p text:style-name="Normal"><draw:custom-shape svg:x="0.98472in" svg:y="8.61458in" svg:width="6.30208in" svg:height="0.09375in" draw:z-index="0" draw:id="id13" draw:style-name="a13" draw:name="Horizontal Line 26" text:anchor-type="as-char"><svg:title/><svg:desc/><draw:enhanced-geometry draw:type="non-primitive" svg:viewBox="0 0 21600 21600" draw:enhanced-path="M 0 0 L 21600 0 21600 21600 0 21600 Z N"/></draw:custom-shape></text:p>
      <text:p text:style-name="P193">Déroulement et formats</text:p>
      <text:p text:style-name="Normal">Chaque rencontre est pensée en fonction de l’âge des enfants et du projet de la structure. Qu’il s’agisse d’une séance unique, d’une demi-journée ou d’un parcours sur plusieurs rencontres, l’intervention s’articule généralement autour de plusieurs temps :</text:p>
      <text:list text:style-name="LFO18" text:continue-numbering="true">
        <text:list-item>
          <text:p text:style-name="P194">Une lecture à voix haute, vivante et immersive.<text:s/></text:p>
        </text:list-item>
        <text:list-item>
          <text:p text:style-name="P195">Un temps d’échange autour de l’histoire et de ses secrets.<text:s/></text:p>
        </text:list-item>
        <text:list-item>
          <text:p text:style-name="P196">Une découverte du lien entre le conte et les lieux réels de la forêt.<text:s/></text:p>
        </text:list-item>
        <text:list-item>
          <text:p text:style-name="P197">Une activité complémentaire autour du dessin, de l’observation ou de l’imaginaire.<text:s/></text:p>
        </text:list-item>
      </text:list>
      <text:p text:style-name="Normal"><draw:custom-shape svg:x="0in" svg:y="0in" svg:width="45.51042in" svg:height="0.00139in" draw:z-index="0" draw:id="id14" draw:style-name="a14" draw:name="Horizontal Line 27" text:anchor-type="as-char"><svg:title/><svg:desc/><draw:enhanced-geometry draw:type="non-primitive" svg:viewBox="0 0 21600 21600" draw:enhanced-path="M 0 0 L 21600 0 21600 21600 0 21600 Z N"/></draw:custom-shape></text:p>
      <text:p text:style-name="P198">Une expérience sensible</text:p>
      <text:p text:style-name="Normal">Les histoires prennent souvent naissance dans des moments simples, comme les récits que l’on raconte le soir à voix basse. Lors des rencontres, je veille à préserver cette dimension : une voix, un temps calme, une attention partagée.</text:p>
      <text:p text:style-name="Normal">Un espace où l’on écoute, où l’on imagine, et où les histoires prennent le temps d’exister.</text:p>
      <text:p text:style-name="Normal"><draw:custom-shape svg:x="0in" svg:y="0in" svg:width="45.51042in" svg:height="0.00139in" draw:z-index="0" draw:id="id15" draw:style-name="a15" draw:name="Horizontal Line 28" text:anchor-type="as-char"><svg:title/><svg:desc/><draw:enhanced-geometry draw:type="non-primitive" svg:viewBox="0 0 21600 21600" draw:enhanced-path="M 0 0 L 21600 0 21600 21600 0 21600 Z N"/></draw:custom-shape></text:p>
      <text:p text:style-name="P199">Informations pratiques</text:p>
      <text:p text:style-name="Normal">Ces interventions sont imaginées sur mesure, selon les projets pédagogiques, culturels ou artistiques des structures qui les accueillent.</text:p>
      <text:p text:style-name="Normal"><text:span text:style-name="T200">👉</text:span><text:s/>Pour imaginer une rencontre ou échanger autour d’un projet :</text:p>
      <text:p text:style-name="Normal">[Formulaire de contact ou lien vers la page Contact]</text:p>
      <text:p text:style-name="Normal"/>
      <text:p text:style-name="P201">L’univers</text:p>
      <text:p text:style-name="Normal"><text:span text:style-name="T202">Les Contes de Zoufftgen</text:span><text:s/>prennent place dans un village existant.</text:p>
      <text:p text:style-name="Normal">Les lieux évoqués dans les histoires — un arbre, une maison, un chemin — peuvent être vus, parcourus, reconnus.</text:p>
      <text:p text:style-name="Normal">Cette proximité crée un lien particulier entre fiction et réalité, et invite à regarder autrement ce qui nous entoure.</text:p>
      <text:p text:style-name="P203">Bloc 1<text:tab/></text:p>
      <text:p text:style-name="Normal">Photo du vrai chêne<text:line-break/>→ illustration du conte</text:p>
      <text:p text:style-name="Normal">Petit texte très court :</text:p>
      <text:p text:style-name="Normal">Le vieux chêne du Vogelsang, avant la tornade qui l’a arraché.<text:s/>Cette<text:s/>photographie<text:s/>est<text:s/>conservée à la ferme où se dressait autrefois le chêne du conte.<draw:custom-shape svg:x="0in" svg:y="0in" svg:width="45.51042in" svg:height="0.00139in" draw:z-index="0" draw:id="id16" draw:style-name="a16" draw:name="Horizontal Line 105" text:anchor-type="as-char"><svg:title/><svg:desc/><draw:enhanced-geometry draw:type="non-primitive" svg:viewBox="0 0 21600 21600" draw:enhanced-path="M 0 0 L 21600 0 21600 21600 0 21600 Z N"/></draw:custom-shape></text:p>
      <text:p text:style-name="P204">Bloc 2</text:p>
      <text:soft-page-break/>
      <text:p text:style-name="Normal">Maison forestière réelle<text:line-break/>→ illustration</text:p>
      <text:p text:style-name="Normal">La maison forestière apparaît dans plusieurs contes. Elle se trouve au bord de la forêt depuis plus d’un siècle.</text:p>
      <text:p text:style-name="Normal"><draw:custom-shape svg:x="0in" svg:y="0in" svg:width="45.51042in" svg:height="0.00139in" draw:z-index="0" draw:id="id17" draw:style-name="a17" draw:name="Horizontal Line 106" text:anchor-type="as-char"><svg:title/><svg:desc/><draw:enhanced-geometry draw:type="non-primitive" svg:viewBox="0 0 21600 21600" draw:enhanced-path="M 0 0 L 21600 0 21600 21600 0 21600 Z N"/></draw:custom-shape></text:p>
      <text:p text:style-name="P205">Bloc 3</text:p>
      <text:p text:style-name="Normal">Chemin / forêt / ferme<text:line-break/>→ illustration</text:p>
      <text:p text:style-name="Normal">À Zoufftgen, certains lieux semblent ordinaires… jusqu’au moment où une histoire vient les éclairer autrement.</text:p>
      <text:p text:style-name="P206">Zoufftgen, un village à la frontière</text:p>
      <text:p text:style-name="P207">Les Contes de Zoufftgen sont nés dans un petit village mosellan situé à la frontière franco-luxembourgeoise, entre forêt, chemins anciens et paysages ruraux.</text:p>
      <text:p text:style-name="P208">Le village existe depuis le Moyen Âge. Certains sentiers sont empruntés depuis des générations, et plusieurs lieux évoqués dans les histoires portent encore la mémoire de celles et ceux qui y ont vécu avant nous.</text:p>
      <text:p text:style-name="P209">C’est là que tout commence : dans une vieille maison forestière autrefois habitée par un garde forestier, sous un grand chêne qui existe réellement, au détour d’une ferme ou d’un chemin bordé d’arbres.</text:p>
      <text:p text:style-name="P210">Les histoires prennent racine dans ces lieux familiers, observés au fil des saisons, puis doucement transformés par l’imaginaire.</text:p>
      <text:p text:style-name="Normal"><text:span text:style-name="T211"><draw:custom-shape svg:x="0in" svg:y="0in" svg:width="45.51042in" svg:height="0.00139in" draw:z-index="0" draw:id="id18" draw:style-name="a18" draw:name="Horizontal Line 87" text:anchor-type="as-char"><svg:title/><svg:desc/><draw:enhanced-geometry draw:type="non-primitive" svg:viewBox="0 0 21600 21600" draw:enhanced-path="M 0 0 L 21600 0 21600 21600 0 21600 Z N"/></draw:custom-shape></text:span></text:p>
      <text:p text:style-name="P212">Des lieux que l’on peut retrouver</text:p>
      <text:p text:style-name="P213">Chaque conte s’appuie sur des lieux bien réels du village. La ferme du Vogelsang, la maison forestière, le vieux chêne, certains chemins ou coins de forêt existent réellement et peuvent être retrouvés par les enfants et leurs familles.</text:p>
      <text:p text:style-name="P214">Cette proximité entre le réel et l’imaginaire transforme parfois la lecture en une sorte de promenade. On reconnaît un détail, une silhouette, un arbre aperçu quelques jours plus tôt. La forêt traversée le dimanche devient soudain celle d’une histoire.</text:p>
      <text:p text:style-name="Normal"><text:span text:style-name="T215"><draw:custom-shape svg:x="0in" svg:y="0in" svg:width="45.51042in" svg:height="0.00139in" draw:z-index="0" draw:id="id19" draw:style-name="a19" draw:name="Horizontal Line 88" text:anchor-type="as-char"><svg:title/><svg:desc/><draw:enhanced-geometry draw:type="non-primitive" svg:viewBox="0 0 21600 21600" draw:enhanced-path="M 0 0 L 21600 0 21600 21600 0 21600 Z N"/></draw:custom-shape></text:span></text:p>
      <text:p text:style-name="P216">Une nature très présente</text:p>
      <text:soft-page-break/>
      <text:p text:style-name="P217">Les animaux, les feuilles d’automne, les noisettes, la neige, les glands ou les vieux arbres ne sont jamais de simples décors. Ils accompagnent les récits et participent pleinement à l’univers des contes.</text:p>
      <text:p text:style-name="P218">Chaque histoire porte un peu de la saison dans laquelle elle a été imaginée : les lumières d’hiver, les odeurs de forêt après la pluie, le silence de la neige ou les couleurs des chemins à l’automne.</text:p>
      <text:p text:style-name="P219">À travers ces récits, j’essaie aussi d’inviter les enfants à regarder autrement ce qui les entoure : les arbres, les animaux croisés en promenade, les lieux familiers que l’on finit parfois par ne plus voir.</text:p>
      <text:p text:style-name="Normal"><text:span text:style-name="T220"><draw:custom-shape svg:x="0in" svg:y="0in" svg:width="45.51042in" svg:height="0.00139in" draw:z-index="0" draw:id="id20" draw:style-name="a20" draw:name="Horizontal Line 89" text:anchor-type="as-char"><svg:title/><svg:desc/><draw:enhanced-geometry draw:type="non-primitive" svg:viewBox="0 0 21600 21600" draw:enhanced-path="M 0 0 L 21600 0 21600 21600 0 21600 Z N"/></draw:custom-shape></text:span></text:p>
      <text:p text:style-name="P221">Entre France et Luxembourg</text:p>
      <text:p text:style-name="P222">La frontière toute proche fait naturellement partie de cet univers. Les rencontres organisées dans les bibliothèques, les écoles et les structures culturelles de la région permettent aujourd’hui aux Contes de Zoufftgen de circuler de part et d’autre de la frontière.</text:p>
      <text:p text:style-name="Normal"><text:span text:style-name="T223">Dans cette région où plusieurs langues se croisent au quotidien, les histoires voyagent elles aussi naturellement d’un territoire à l’autre.</text:span></text:p>
      <text:p text:style-name="P224"/>
      <text:p text:style-name="P225">Parutions &amp; Rencontres</text:p>
      <text:p text:style-name="P226">Parutions &amp; Rencontres</text:p>
      <text:p text:style-name="Normal">Le projet<text:s/><text:span text:style-name="T227">Les Contes de Zoufftgen</text:span><text:s/>prend vie au fil des lectures, des rencontres et des échanges avec les enfants, les familles et les structures culturelles de la région.</text:p>
      <text:p text:style-name="Normal">À travers ces moments, les histoires quittent doucement les pages pour rejoindre les lieux, les voix et les souvenirs.</text:p>
      <text:p text:style-name="Normal"><draw:custom-shape svg:x="0in" svg:y="0in" svg:width="45.51042in" svg:height="0.00139in" draw:z-index="0" draw:id="id21" draw:style-name="a21" draw:name="Horizontal Line 61" text:anchor-type="as-char"><svg:title/><svg:desc/><draw:enhanced-geometry draw:type="non-primitive" svg:viewBox="0 0 21600 21600" draw:enhanced-path="M 0 0 L 21600 0 21600 21600 0 21600 Z N"/></draw:custom-shape></text:p>
      <text:p text:style-name="P228">Rencontres</text:p>
      <text:p text:style-name="P229">Bibliothèque de Dudelange — Luxembourg</text:p>
      <text:p text:style-name="Normal">Lecture du<text:s/><text:span text:style-name="T230">Petit Zouffarceur</text:span><text:s/>suivie d’un temps d’échange et d’un atelier dessin autour des personnages du conte.</text:p>
      <text:p text:style-name="Normal">[photo élégante]</text:p>
      <text:p text:style-name="Normal"><draw:custom-shape svg:x="0in" svg:y="0in" svg:width="45.51042in" svg:height="0.00139in" draw:z-index="0" draw:id="id22" draw:style-name="a22" draw:name="Horizontal Line 62" text:anchor-type="as-char"><svg:title/><svg:desc/><draw:enhanced-geometry draw:type="non-primitive" svg:viewBox="0 0 21600 21600" draw:enhanced-path="M 0 0 L 21600 0 21600 21600 0 21600 Z N"/></draw:custom-shape></text:p>
      <text:p text:style-name="P231">Lectures jeunesse &amp; structures périscolaires</text:p>
      <text:soft-page-break/>
      <text:p text:style-name="Normal">Temps de lecture, échanges et découvertes autour des contes, de la nature et du patrimoine local.</text:p>
      <text:p text:style-name="Normal">[photo]</text:p>
      <text:p text:style-name="Normal"><draw:custom-shape svg:x="0in" svg:y="0in" svg:width="45.51042in" svg:height="0.00139in" draw:z-index="0" draw:id="id23" draw:style-name="a23" draw:name="Horizontal Line 63" text:anchor-type="as-char"><svg:title/><svg:desc/><draw:enhanced-geometry draw:type="non-primitive" svg:viewBox="0 0 21600 21600" draw:enhanced-path="M 0 0 L 21600 0 21600 21600 0 21600 Z N"/></draw:custom-shape></text:p>
      <text:p text:style-name="P232">Rencontres &amp; dédicaces</text:p>
      <text:p text:style-name="Normal">Moments d’échange avec les lecteurs lors de rencontres locales et séances de dédicaces.</text:p>
      <text:p text:style-name="Normal">[photo boutique Volmerange]</text:p>
      <text:p text:style-name="Normal"><draw:custom-shape svg:x="0in" svg:y="0in" svg:width="45.51042in" svg:height="0.00139in" draw:z-index="0" draw:id="id24" draw:style-name="a24" draw:name="Horizontal Line 64" text:anchor-type="as-char"><svg:title/><svg:desc/><draw:enhanced-geometry draw:type="non-primitive" svg:viewBox="0 0 21600 21600" draw:enhanced-path="M 0 0 L 21600 0 21600 21600 0 21600 Z N"/></draw:custom-shape></text:p>
      <text:p text:style-name="P233">Parutions</text:p>
      <text:p text:style-name="P234">Presse locale &amp; régionale</text:p>
      <text:p text:style-name="Normal">Les Contes de Zoufftgen ont également fait l’objet de plusieurs articles consacrés à la naissance du projet, à son ancrage local et à son univers.</text:p>
      <text:p text:style-name="Normal">[visuel article 1]</text:p>
      <text:p text:style-name="Normal">petit extrait court</text:p>
      <text:p text:style-name="Normal">[visuel article 2]</text:p>
      <text:p text:style-name="Normal">petit extrait court</text:p>
      <text:p text:style-name="P235">A<text:s/>propos</text:p>
      <text:p text:style-name="Normal">L’aventure des Contes de Zoufftgen est née d’un lien profond avec les paysages de mon village, à la frontière franco-luxembourgeoise. Une forêt, un vieux chêne, un chemin de terre ou une ferme deviennent le point de départ d’histoires où le merveilleux s’invite doucement dans le réel.</text:p>
      <text:p text:style-name="Normal">À travers mes récits, j’essaie de redonner une place à l’émerveillement, à la mémoire des lieux et à cette part d’imaginaire qui transforme le regard des enfants sur ce qui les entoure.</text:p>
      <text:p text:style-name="Normal">Mes premières histoires sont nées le soir, pour mon fils. Des récits racontés à voix basse pour terminer la journée, qui se sont peu à peu déposés sur le papier au fil des saisons.</text:p>
      <text:p text:style-name="Normal">Chaque album est pensé comme un ensemble vivant, mêlant récit, illustration et découverte. Les histoires se prolongent naturellement à la fin de l’ouvrage à travers des pages consacrées au patrimoine local, à la nature, au dessin ou à de petits moments de transmission à partager ensemble.</text:p>
      <text:soft-page-break/>
      <text:p text:style-name="Normal">Dans mes livres, le texte et l’image avancent ensemble. J’écris et j’illustre chaque histoire dans le même mouvement, en laissant toujours une place à l’imagination, à l’observation et au rêve.</text:p>
      <text:p text:style-name="Normal">Parce que je crois que les belles histoires méritent de durer, je conçois mes ouvrages avec le même soin que mes récits : couverture rigide, papier épais, finitions délicates… Des livres pensés pour être gardés, relus et transmis.</text:p>
      <text:p text:style-name="Normal">Aujourd’hui, cet univers voyage de part et d’autre de la frontière à travers des lectures dans les écoles et les bibliothèques, où les enfants découvrent parfois avec surprise que les lieux des contes existent réellement.</text:p>
      <text:p text:style-name="Normal">Les histoires que l’on raconte le soir ne disparaissent jamais tout à fait.<text:line-break/>Elles restent, quelque part, comme une présence douce.</text:p>
      <text:p text:style-name="Normal">« Je crois profondément que les histoires et la nature sont les plus beaux terrains de jeu pour l'enfance. Mon rôle est de mettre un peu de poussière d'étoile et de curiosité dans le quotidien des enfants, pour les aider à observer, à rêver et à aimer le monde qui les entoure. » — Hélène</text:p>
      <text:p text:style-name="P236"/>
      <text:p text:style-name="P237">Post épinglé Facebook</text:p>
      <text:p text:style-name="Normal">Il était une fois, à Zoufftgen…</text:p>
      <text:p text:style-name="Normal">À Zoufftgen, certains lieux racontent des histoires.</text:p>
      <text:p text:style-name="Normal">Un vieux chêne, une maison, un chemin en lisière de forêt…<text:line-break/>Des endroits bien réels, traversés chaque jour, mais qui, parfois, laissent entrevoir autre chose.</text:p>
      <text:p text:style-name="Normal">C’est ainsi qu’est née la collection Les Contes de Zoufftgen.</text:p>
      <text:p text:style-name="Normal">Des histoires ancrées dans le village, où se mêlent nature, mémoire et transmission, écrites et illustrées avec le souhait de préserver une part d’imaginaire liée au réel.</text:p>
      <text:p text:style-name="Normal">Chaque livre est conçu comme un objet à part entière : couverture rigide, papier épais, finitions soignées.<text:line-break/>Des livres que l’on garde, que l’on offre, et<text:s/>que l’on transmet.</text:p>
      <text:p text:style-name="Normal">Au fil du temps, cet univers se prolonge aussi autrement :<text:line-break/>à travers des rencontres en bibliothèques et en écoles, et parfois, par des objets inspirés des contes, façonnés à la main.</text:p>
      <text:p text:style-name="Normal">—</text:p>
      <text:soft-page-break/>
      <text:p text:style-name="Normal"><text:span text:style-name="T238">📍</text:span><text:s/>Les histoires prennent vie à Zoufftgen<text:line-break/><text:span text:style-name="T239">📖</text:span><text:s/>La<text:s/>collection est disponible ici :<text:line-break/><text:span text:style-name="T240">👉</text:span><text:s/><text:a xlink:href="http://www.lescontesdezoufftgen.fr" office:target-frame-name="_top" xlink:show="replace">www.lescontesdezoufftgen.fr</text:a></text:p>
      <text:p text:style-name="P24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Agency FB" svg:font-family="Agency FB" style:font-family-generic="swiss" style:font-pitch="variable" svg:panose-1="2 11 5 3 2 2 2 2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NormalWeb" style:display-name="Normal (Web)" style:family="paragraph" style:parent-style-name="Normal">
      <style:text-properties style:font-name="Times New Roman"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yrille Hardy</meta:initial-creator>
    <dc:creator>Cyrille Hardy</dc:creator>
    <meta:creation-date>2026-04-02T19:36:00Z</meta:creation-date>
    <dc:date>2026-05-27T18:17:00Z</dc:date>
    <meta:template xlink:href="Normal" xlink:type="simple"/>
    <meta:editing-cycles>62</meta:editing-cycles>
    <meta:editing-duration>PT2095440S</meta:editing-duration>
    <meta:document-statistic meta:page-count="12" meta:paragraph-count="247" meta:word-count="2595" meta:character-count="14599" meta:row-count="453" meta:non-whitespace-character-count="12251"/>
  </office:meta>
</office:document-meta>
</file>