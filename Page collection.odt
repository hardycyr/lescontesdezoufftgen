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T63" style:parent-style-name="Policepardéfaut" style:family="text">
      <style:text-properties fo:font-style="italic" style:font-style-asian="italic" style:font-style-complex="italic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 fo:background-color="#FFFF00"/>
    </style:style>
    <style:style style:name="P66" style:parent-style-name="Normal" style:family="paragraph">
      <style:text-properties fo:background-color="#FFFF00"/>
    </style:style>
    <style:style style:name="P67" style:parent-style-name="Normal" style:family="paragraph">
      <style:text-properties fo:font-weight="bold" style:font-weight-asian="bold" style:font-weight-complex="bold" fo:background-color="#FFFF00"/>
    </style:style>
    <style:style style:name="P68" style:parent-style-name="Normal" style:family="paragraph">
      <style:text-properties fo:background-color="#FFFF00"/>
    </style:style>
    <style:style style:name="P69" style:parent-style-name="Normal" style:family="paragraph">
      <style:text-properties fo:font-weight="bold" style:font-weight-asian="bold" style:font-weight-complex="bold" fo:background-color="#FFFF00"/>
    </style:style>
    <style:style style:name="T70" style:parent-style-name="Policepardéfaut" style:family="text">
      <style:text-properties fo:background-color="#FFFF00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1" style:family="paragraph"/>
    <style:style style:name="P78" style:parent-style-name="Normal" style:list-style-name="LFO1" style:family="paragraph"/>
    <style:style style:name="P79" style:parent-style-name="Normal" style:list-style-name="LFO1" style:family="paragraph"/>
    <style:style style:name="P80" style:parent-style-name="Normal" style:family="paragraph">
      <style:text-properties fo:font-weight="bold" style:font-weight-asian="bold" style:font-weight-complex="bold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LA COLLECTION</text:p>
      <text:p text:style-name="P2">Introduction</text:p>
      <text:p text:style-name="P3">La collection</text:p>
      <text:p text:style-name="P4">Les Contes de Zoufftgen sont une collection de contes illustrés écrits et illustrés par Hélène Hardy.</text:p>
      <text:p text:style-name="P5">Chaque histoire prend racine dans un lieu, une saison, un arbre ou un souvenir de Zoufftgen avant de prendre le chemin de l'imaginaire.</text:p>
      <text:p text:style-name="P6">(une belle photo de plusieurs livres ensemble)</text:p>
      <text:p text:style-name="Normal"><text:span text:style-name="T7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P8">LES ALBUMS</text:p>
      <text:p text:style-name="P9">Présentation des albums.</text:p>
      <text:p text:style-name="P10">Pour chaque livre :</text:p>
      <text:p text:style-name="P11">Le Petit Zouffarceur</text:p>
      <text:p text:style-name="Normal"><text:span text:style-name="T12">Tome 1 de la collection</text:span></text:p>
      <text:p text:style-name="P13">Petite phrase courte (pas la 4e de couverture complète) :</text:p>
      <text:p text:style-name="P14">La rencontre avec le petit gardien malicieux des forêts de Zoufftgen.</text:p>
      <text:p text:style-name="P15">Bouton :</text:p>
      <text:p text:style-name="P16">Découvrir l'album</text:p>
      <text:p text:style-name="Normal"><text:span text:style-name="T17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span></text:p>
      <text:p text:style-name="P18">La<text:s/>maison du Petit Zouffarceur</text:p>
      <text:p text:style-name="Normal"><text:span text:style-name="T19">Tome 2</text:span></text:p>
      <text:p text:style-name="P20">Une nouvelle aventure au cœur du vieux chêne du Vogelsang.</text:p>
      <text:p text:style-name="P21">Découvrir l'album</text:p>
      <text:p text:style-name="Normal"><text:span text:style-name="T22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span></text:p>
      <text:p text:style-name="P23">Papa Sanglier et sa dent en or</text:p>
      <text:p text:style-name="Normal"><text:span text:style-name="T24">Tome 3</text:span></text:p>
      <text:p text:style-name="P25">Une histoire tendre et drôle inspirée des habitants les plus emblématiques de la forêt.</text:p>
      <text:p text:style-name="P26">Découvrir l'album</text:p>
      <text:soft-page-break/>
      <text:p text:style-name="Normal"><text:span text:style-name="T27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span></text:p>
      <text:p text:style-name="P28">Tome 4</text:p>
      <text:p text:style-name="P29">(si tu souhaites déjà le montrer)</text:p>
      <text:p text:style-name="P30">Ou ne rien mettre tant qu'il n'est pas annoncé.</text:p>
      <text:p text:style-name="Normal"><text:span text:style-name="T31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32">PLUS QU'UNE HISTOIRE</text:p>
      <text:p text:style-name="P33">(photo intérieure d'un livre ou enfant qui dessine)</text:p>
      <text:p text:style-name="P34">Chaque album est conçu comme un conte-atelier.</text:p>
      <text:p text:style-name="P35">À l'histoire illustrée s'ajoutent des propositions pour prolonger la lecture : apprendre à dessiner un personnage du conte, observer la nature qui l'a inspiré ou partager un moment créatif en famille.</text:p>
      <text:p text:style-name="P36">Puis :</text:p>
      <text:p text:style-name="P37">Dessin pas à pas, recettes, découvertes et observations prolongent l'aventure bien après la dernière page.</text:p>
      <text:p text:style-name="Normal"><text:span text:style-name="T38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span></text:p>
      <text:p text:style-name="P39">UN UNIVERS QUI SE CONSTRUIT LIVRE APRÈS LIVRE</text:p>
      <text:p text:style-name="P40">Certains récits se répondent et prolongent les aventures de personnages déjà rencontrés, tandis que d'autres explorent de nouvelles histoires inspirées du village.</text:p>
      <text:p text:style-name="P41">Tous prennent racine dans le même univers, entre nature, mémoire et imaginaire.</text:p>
      <text:p text:style-name="P42">(photo panoramique de plusieurs couvertures ou d'une mise en scène des livres)</text:p>
      <text:p text:style-name="Normal"><text:span text:style-name="T43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span></text:p>
      <text:p text:style-name="P44">OÙ TROUVER LES ALBUMS ?</text:p>
      <text:p text:style-name="P45">Les albums peuvent être commandés directement en ligne ou trouvés auprès de partenaires locaux.</text:p>
      <text:p text:style-name="P46">Commander en ligne</text:p>
      <text:p text:style-name="P47">Bouton :</text:p>
      <text:p text:style-name="P48">Accéder à la boutique</text:p>
      <text:p text:style-name="Normal"><text:span text:style-name="T49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span></text:p>
      <text:p text:style-name="P50">Retrait à Zoufftgen</text:p>
      <text:soft-page-break/>
      <text:p text:style-name="P51">Sur rendez-vous.</text:p>
      <text:p text:style-name="Normal"><text:span text:style-name="T52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span></text:p>
      <text:p text:style-name="P53">En boutique</text:p>
      <text:p text:style-name="P54">Artisan'Art – Volmerange-les-Mines</text:p>
      <text:p text:style-name="P55">Structure idéale</text:p>
      <text:p text:style-name="P56">1. Titre de page</text:p>
      <text:p text:style-name="Normal"><text:span text:style-name="T57">La collection</text:span></text:p>
      <text:p text:style-name="Normal">Sous-titre :</text:p>
      <text:p text:style-name="P58">Introduction</text:p>
      <text:p text:style-name="Normal">Les Contes de Zoufftgen sont une collection de contes illustrés ancrés dans un village réel. Chaque album prolonge la lecture à travers le dessin, l'observation de la nature et des moments à partager.</text:p>
      <text:p text:style-name="Normal">Puis plus bas :</text:p>
      <text:p text:style-name="P59">Plus qu'un album jeunesse</text:p>
      <text:p text:style-name="Normal">Chaque livre est conçu comme un petit conte-atelier : une histoire illustrée, accompagnée d'activités créatives et de découvertes inspirées du récit.</text:p>
      <text:p text:style-name="Normal"/>
      <text:p text:style-name="Normal"><text:span text:style-name="T60">Des albums jeunesse à lire, à garder et à transmettre.</text:span></text:p>
      <text:p text:style-name="Normal">Puis court texte :</text:p>
      <text:p text:style-name="Normal">Les Contes de Zoufftgen sont une collection d’albums jeunesse écrits et illustrés par Hélène Hardy. Chaque livre s’ancre dans un lieu réel du village et prolonge l’histoire à travers le dessin, la découverte et la transmission.</text:p>
      <text:p text:style-name="P61">2. Bloc “Les albums”</text:p>
      <text:p text:style-name="Normal">Présente les livres en grille élégante : couverture, titre, tome, phrase courte, bouton.</text:p>
      <text:p text:style-name="Normal">Exemple :</text:p>
      <text:p text:style-name="Normal"><text:span text:style-name="T62">Le Petit Zouffarceur</text:span><text:line-break/><text:span text:style-name="T63">Tome 1 de la collection</text:span></text:p>
      <text:p text:style-name="Normal">Une première rencontre avec l’esprit malicieux qui veille sur Zoufftgen.</text:p>
      <text:p text:style-name="Normal">Bouton :<text:s/><text:span text:style-name="T64">Découvrir le livre</text:span></text:p>
      <text:p text:style-name="Normal"/>
      <text:soft-page-break/>
      <text:p text:style-name="P65">(Le Petit Zouffarceur</text:p>
      <text:p text:style-name="P66">La rencontre avec le petit gardien malicieux de la forêt de Zoufftgen.</text:p>
      <text:p text:style-name="P67">La Maison du Petit Zouffarceur</text:p>
      <text:p text:style-name="P68">Une aventure au cœur du vieux chêne du Vogelsang.</text:p>
      <text:p text:style-name="P69">Papa Sanglier et sa dent en or</text:p>
      <text:p text:style-name="Normal"><text:span text:style-name="T70">Une histoire tendre et drôle autour d'un sanglier bien connu du village.)</text:span></text:p>
      <text:p text:style-name="Normal"/>
      <text:p text:style-name="P71">3. Bloc “Des livres pensés comme des objets”</text:p>
      <text:p text:style-name="Normal">C’est ici que tu mets la qualité.</text:p>
      <text:p text:style-name="Normal">Chaque album est conçu avec soin : format carré 21 × 21 cm, couverture rigide, papier épais, finitions délicates. Des livres pensés pour être relus, offerts et gardés.</text:p>
      <text:p text:style-name="Normal">Tu peux ajouter 3 pictos sobres :<text:line-break/><text:span text:style-name="T72">Couverture rigide</text:span><text:s/>/<text:s/><text:span text:style-name="T73">Papier épais</text:span><text:s/>/<text:s/><text:span text:style-name="T74">Finitions soignées</text:span></text:p>
      <text:p text:style-name="P75">4. Bloc “Un conte-atelier”</text:p>
      <text:p text:style-name="Normal">Oui, c’est exactement le bon terme.</text:p>
      <text:p text:style-name="Normal">Je mettrais :</text:p>
      <text:p text:style-name="P76">Plus qu'une histoire</text:p>
      <text:p text:style-name="Normal">Chaque album est conçu comme un conte-atelier.</text:p>
      <text:p text:style-name="Normal">À l'histoire illustrée s'ajoutent des propositions pour prolonger la lecture : apprendre à dessiner un personnage du conte, observer la nature qui l'a inspiré ou partager un moment créatif en famille.</text:p>
      <text:p text:style-name="Normal">Et juste en dessous :</text:p>
      <text:list text:style-name="LFO1" text:continue-numbering="true">
        <text:list-item>
          <text:p text:style-name="P77">une photo d'une page de dessin pas à pas ;<text:s/></text:p>
        </text:list-item>
        <text:list-item>
          <text:p text:style-name="P78">ou une photo d'un enfant qui dessine ;<text:s/></text:p>
        </text:list-item>
        <text:list-item>
          <text:p text:style-name="P79">ou une photo intérieure du livre.</text:p>
        </text:list-item>
      </text:list>
      <text:p text:style-name="Normal"/>
      <text:p text:style-name="P80">Un conte-atelier à partager</text:p>
      <text:p text:style-name="Normal">Au-delà du récit illustré, chaque livre invite l’enfant à prolonger l’histoire : apprendre à dessiner un personnage, découvrir un lieu réel, observer la nature ou partager une recette inspirée du conte.</text:p>
      <text:soft-page-break/>
      <text:p text:style-name="Normal">Puis 3 petites cartes :</text:p>
      <text:p text:style-name="Normal"><text:span text:style-name="T81">Dessiner</text:span><text:line-break/>Un pas-à-pas pour s’approprier les personnages.</text:p>
      <text:p text:style-name="Normal"><text:span text:style-name="T82">Découvrir</text:span><text:line-break/>Un lien avec un lieu réel ou un élément de nature.</text:p>
      <text:p text:style-name="Normal"><text:span text:style-name="T83">Partager</text:span><text:line-break/>Une recette, un geste ou un moment à vivre ensemble.</text:p>
      <text:p text:style-name="P84">5. Fin de page</text:p>
      <text:p text:style-name="Normal">Livre après livre, les Contes de Zoufftgen tissent un univers commun où les lieux réels du village deviennent le point de départ de nouvelles histoires.</text:p>
      <text:p text:style-name="Normal">Bouton :<text:s/><text:span text:style-name="T85">Commander un album</text:span><text:s/>ou<text:s/><text:span text:style-name="T86">Découvrir l’univers</text:span>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yrille Hardy</meta:initial-creator>
    <dc:creator>Cyrille Hardy</dc:creator>
    <meta:creation-date>2026-05-31T19:42:00Z</meta:creation-date>
    <dc:date>2026-06-01T18:18:00Z</dc:date>
    <meta:template xlink:href="Normal" xlink:type="simple"/>
    <meta:editing-cycles>5</meta:editing-cycles>
    <meta:editing-duration>PT76680S</meta:editing-duration>
    <meta:document-statistic meta:page-count="5" meta:paragraph-count="80" meta:word-count="839" meta:character-count="4721" meta:row-count="146" meta:non-whitespace-character-count="3962"/>
  </office:meta>
</office:document-meta>
</file>